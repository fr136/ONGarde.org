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4.085cm"/>
    </style:style>
    <style:style style:name="Tableau1.B" style:family="table-column">
      <style:table-column-properties style:column-width="4.754cm"/>
    </style:style>
    <style:style style:name="Tableau1.C" style:family="table-column">
      <style:table-column-properties style:column-width="8.162cm"/>
    </style:style>
    <style:style style:name="Tableau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 Le Profil des ONG que vous Défendez</text:h>
      <text:p text:style-name="Text_20_body">Les ONG comme Protect.ngo ne sont pas des entreprises classiques. Leur mission sociale et humanitaire les expose à des risques uniques.</text:p>
      <text:list xml:id="list3695391065" text:style-name="L1">
        <text:list-item>
          <text:p text:style-name="P1"><text:span text:style-name="Strong_20_Emphasis">Des Cibles de Choix, Pas des Cibles par Hasard</text:span> : Contrairement à une idée reçue, les attaquants ciblent spécifiquement les ONG, non pas pour leur taille, mais pour leur <text:span text:style-name="Strong_20_Emphasis">faible niveau de défense</text:span> et la <text:span text:style-name="Strong_20_Emphasis">valeur stratégique de leurs données</text:span> . Comme le souligne un expert, "les attaquants ne s'en prennent pas aux ONG parce que ce sont de grandes cibles, ils s'en prennent à elles parce que ce sont des cibles faciles" .</text:p>
        </text:list-item>
        <text:list-item>
          <text:p text:style-name="P1"><text:span text:style-name="Strong_20_Emphasis">Des Données d'une Sensibilité Extrême</text:span> : Ces organisations manipulent des informations dont la fuite peut avoir des conséquences désastreuses. Selon une étude, <text:span text:style-name="Strong_20_Emphasis">81% des ONG considèrent les données des donateurs comme critiques</text:span>, suivies par les données des bénéficiaires (74%) et du personnel (70%) . Pour une ONG de défense des droits humains, révéler l'identité d'un témoin ou d'un bénéficiaire peut le mettre en danger de mort.</text:p>
        </text:list-item>
        <text:list-item>
          <text:p text:style-name="P1"><text:span text:style-name="Strong_20_Emphasis">Une Vulnérabilité Structurelle</text:span> : Le secteur cumule les fragilités : budgets serrés, manque de personnel IT dédié, et une culture souvent focalisée sur la mission terrain plutôt que sur la cybersécurité. Une étude alarmante révèle que <text:span text:style-name="Strong_20_Emphasis">86% des ONG n'ont pas de plan de cybersécurité</text:span> et que plus de la moitié d'entre elles ont déjà été victimes d'une attaque .</text:p>
        </text:list-item>
        <text:list-item>
          <text:p text:style-name="P1"><text:span text:style-name="Strong_20_Emphasis">Un Contexte Géopolitique Tend u</text:span> : Les menaces sont variées. Elles vont du rançongiciel opportuniste à des campagnes d'espionnage ou de désinformation menées par des États pour affaiblir des organisations qui les dérangent . Le conflit en Ukraine a été un révélateur, avec de nombreuses ONG humanitaires prises pour cibles .</text:p>
        </text:list-item>
      </text:list>
      <text:p text:style-name="Horizontal_20_Line"/>
      <text:h text:style-name="Heading_20_3" text:outline-level="3">2. Ce qui est Indispensable à Prévoir : Les Piliers d'une Défense Réaliste</text:h>
      <text:p text:style-name="Text_20_body">Face à ce contexte, votre infrastructure pour ONGarde doit intégrer des briques essentielles, qui sont autant de réponses aux faiblesses du secteur.</text:p>
      <text:h text:style-name="Heading_20_4" text:outline-level="4">Pilier 1 : Gouvernance et Politiques de Sécurité (Le "Savoir-Être")</text:h>
      <text:p text:style-name="Text_20_body">Avant même la technique, il faut des règles. C'est la base de la confiance et de la conformité.</text:p>
      <text:list xml:id="list2727247857" text:style-name="L2">
        <text:list-item>
          <text:p text:style-name="P2"><text:span text:style-name="Strong_20_Emphasis">Classifier les Données</text:span> : Mettre en place une politique de classification (Public, Interne, Confidentiel, Restreint) pour appliquer les bons niveaux de protection .</text:p>
        </text:list-item>
        <text:list-item>
          <text:p text:style-name="P2"><text:span text:style-name="Strong_20_Emphasis">Désigner un Responsable</text:span> : Nommer un responsable de la sécurité des données (même à temps partiel) pour porter la politique et les actions .</text:p>
        </text:list-item>
        <text:list-item>
          <text:p text:style-name="P2"><text:span text:style-name="Strong_20_Emphasis">Former et Sensibiliser</text:span> : Organiser des formations régulières pour tout le personnel et les bénévoles. L'erreur humaine est le premier vecteur d'attaque (phishing) .</text:p>
        </text:list-item>
      </text:list>
      <text:h text:style-name="Heading_20_4" text:outline-level="4">Pilier 2 : Sécurité des Accès et des Identités (Le "Qui a le Droit")</text:h>
      <text:p text:style-name="Text_20_body">C'est le socle technique pour empêcher les intrusions.</text:p>
      <text:list xml:id="list2670757247" text:style-name="L3">
        <text:list-item>
          <text:p text:style-name="P3"><text:soft-page-break/><text:span text:style-name="Strong_20_Emphasis">Authentification Forte (MFA) :</text:span> Rendre le MFA <text:span text:style-name="Strong_20_Emphasis">obligatoire</text:span> sur tous les comptes, y compris ceux des bénévoles. C'est le rempart le plus efficace contre le vol de mots de passe .</text:p>
        </text:list-item>
        <text:list-item>
          <text:p text:style-name="P3"><text:span text:style-name="Strong_20_Emphasis">Gestion Centralisée des Identités (IAM)</text:span> : Mettre en place un annuaire (comme votre Samba AD) pour gérer les droits de façon centralisée et appliquer le principe du <text:span text:style-name="Strong_20_Emphasis">moindre privilège</text:span> (un utilisateur n'a accès qu'à ce dont il a strictement besoin) .</text:p>
        </text:list-item>
        <text:list-item>
          <text:p text:style-name="P3"><text:span text:style-name="Strong_20_Emphasis">Gestion des Mots de Passe</text:span> : Imposer l'utilisation d'un gestionnaire de mots de passe pour générer et stocker des mots de passe uniques et complexes .</text:p>
        </text:list-item>
      </text:list>
      <text:h text:style-name="Heading_20_4" text:outline-level="4">Pilier 3 : Protection de l'Infrastructure et des Données (Le "Comment on Protège")</text:h>
      <text:p text:style-name="Text_20_body">C'est le cœur de votre mission technique.</text:p>
      <text:list xml:id="list4281219562" text:style-name="L4">
        <text:list-item>
          <text:p text:style-name="P4"><text:span text:style-name="Strong_20_Emphasis">Pare-feu et Sécurité Réseau</text:span> : Mettre en place un pare-feu (comme pfSense) pour filtrer les accès et segmenter le réseau. L'usage d'un VPN doit être <text:span text:style-name="Strong_20_Emphasis">obligatoire</text:span> pour tout accès distant, y compris pour les bénévoles .</text:p>
        </text:list-item>
        <text:list-item>
          <text:p text:style-name="P4"><text:span text:style-name="Strong_20_Emphasis">Chiffrement</text:span> : Chiffrer les données <text:span text:style-name="Strong_20_Emphasis">au repos</text:span> (sur les disques) et <text:span text:style-name="Strong_20_Emphasis">en transit</text:span> (avec SSL/TLS pour les sites web et le VPN) .</text:p>
        </text:list-item>
        <text:list-item>
          <text:p text:style-name="P4"><text:span text:style-name="Strong_20_Emphasis">Sauvegardes et Plan de Reprise (PRA)</text:span> : C'est le <text:span text:style-name="Strong_20_Emphasis">point le plus critique</text:span>. Votre stratégie de sauvegarde doit être <text:span text:style-name="Strong_20_Emphasis">immuable</text:span> (protégée contre les modifications) et <text:span text:style-name="Strong_20_Emphasis">régulièrement testée</text:span>. Le rapport de Protect.ngo souligne que 82% des ONG déclarent avoir une procédure, mais il faut absolument vérifier qu'elles fonctionnent via des exercices de restauration . Votre architecture multi-site Lyon/Marseille est une excellente réponse à ce besoin de résilience.</text:p>
        </text:list-item>
        <text:list-item>
          <text:p text:style-name="P4"><text:span text:style-name="Strong_20_Emphasis">Monitoring et Détection (SIEM/XDR)</text:span> : Un outil comme Wazuh est indispensable pour avoir une visibilité sur ce qui se passe sur le réseau, détecter les comportements anormaux et conserver un audit trail pour la conformité (notamment RGPD) .</text:p>
        </text:list-item>
      </text:list>
      <text:h text:style-name="Heading_20_4" text:outline-level="4">Pilier 4 : Réaction et Résilience (Le "Que Faire en Cas de Crise")</text:h>
      <text:p text:style-name="Text_20_body">Il faut se préparer au pire.</text:p>
      <text:list xml:id="list121814668" text:style-name="L5">
        <text:list-item>
          <text:p text:style-name="P5"><text:span text:style-name="Strong_20_Emphasis">Plan de Réponse aux Incidents</text:span> : Avoir un plan écrit, connu et testé. Il doit définir qui fait quoi, comment contenir une attaque, et comment communiquer avec les parties prenantes (donateurs, autorités, bénéficiaires) .</text:p>
        </text:list-item>
        <text:list-item>
          <text:p text:style-name="P5"><text:span text:style-name="Strong_20_Emphasis">Gérer les Risques Tiers</text:span> : Vos ONG utilisent forcément des services externes (cloud, fournisseurs IT). Il faut s'assurer qu'ils respectent les mêmes standards de sécurité. La responsabilité ne peut pas être externalisée .</text:p>
        </text:list-item>
      </text:list>
      <text:p text:style-name="Horizontal_20_Line"/>
      <text:h text:style-name="Heading_20_3" text:outline-level="3">3. Application Concrète à votre Projet ONGarde</text:h>
      <text:p text:style-name="Text_20_body">Votre architecture technique répond parfaitement à ces impératifs, ce qui est une excellente base pour la défendre.</text:p>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Table_20_Heading">Le Besoin du Monde Réel</text:p>
            </table:table-cell>
            <table:table-cell table:style-name="Tableau1.A1" office:value-type="string">
              <text:p text:style-name="Table_20_Heading">Votre Solution Technique (ONGarde)</text:p>
            </table:table-cell>
            <table:table-cell table:style-name="Tableau1.A1" office:value-type="string">
              <text:p text:style-name="Table_20_Heading">Pourquoi c'est la bonne réponse</text:p>
            </table:table-cell>
          </table:table-row>
        </table:table-header-rows>
        <table:table-row>
          <table:table-cell table:style-name="Tableau1.A1" office:value-type="string">
            <text:p text:style-name="Table_20_Contents"><text:span text:style-name="Strong_20_Emphasis">Données Sensibles</text:span> (donateurs, bénéficiaires)</text:p>
          </table:table-cell>
          <table:table-cell table:style-name="Tableau1.A1" office:value-type="string">
            <text:p text:style-name="Table_20_Contents">Samba AD + Nextcloud + PostgreSQL (chiffrées)</text:p>
          </table:table-cell>
          <table:table-cell table:style-name="Tableau1.A1" office:value-type="string">
            <text:p text:style-name="Table_20_Contents">Vous isolez et protégez les données critiques avec des contrôles d'accès stricts et du chiffrement.</text:p>
          </table:table-cell>
        </table:table-row>
        <table:table-row>
          <table:table-cell table:style-name="Tableau1.A1" office:value-type="string">
            <text:p text:style-name="Table_20_Contents"><text:span text:style-name="Strong_20_Emphasis">Accès Sécurisé</text:span> (pour le personnel et bénévoles)</text:p>
          </table:table-cell>
          <table:table-cell table:style-name="Tableau1.A1" office:value-type="string">
            <text:p text:style-name="Table_20_Contents">WireGuard VPN + SSO (Samba AD)</text:p>
          </table:table-cell>
          <table:table-cell table:style-name="Tableau1.A1" office:value-type="string">
            <text:p text:style-name="Table_20_Contents">Vous imposez un tunnel sécurisé et une authentification unique et forte pour tout accès, même pour les bénévoles.</text:p>
          </table:table-cell>
        </table:table-row>
        <table:table-row>
          <table:table-cell table:style-name="Tableau1.A1" office:value-type="string">
            <text:p text:style-name="Table_20_Contents"><text:span text:style-name="Strong_20_Emphasis">Manque de Visibilité</text:span> sur les menaces</text:p>
          </table:table-cell>
          <table:table-cell table:style-name="Tableau1.A1" office:value-type="string">
            <text:p text:style-name="Table_20_Contents">Wazuh (SIEM/XDR)</text:p>
          </table:table-cell>
          <table:table-cell table:style-name="Tableau1.A1" office:value-type="string">
            <text:p text:style-name="Table_20_Contents">Vous apportez la visibilité et l'audit trail qui font défaut à 86% des ONG.</text:p>
          </table:table-cell>
        </table:table-row>
        <table:table-row>
          <table:table-cell table:style-name="Tableau1.A1" office:value-type="string">
            <text:p text:style-name="Table_20_Contents"><text:span text:style-name="Strong_20_Emphasis">Risque de Perte de Données</text:span> (PRA)</text:p>
          </table:table-cell>
          <table:table-cell table:style-name="Tableau1.A1" office:value-type="string">
            <text:p text:style-name="Table_20_Contents">Sauvegardes automatisées + Réplication vers Marseille</text:p>
          </table:table-cell>
          <table:table-cell table:style-name="Tableau1.A1" office:value-type="string">
            <text:p text:style-name="Table_20_Contents">Vous mettez en place une solution robuste qui dépasse la simple sauvegarde pour assurer une vraie continuité d'activité.</text:p>
          </table:table-cell>
        </table:table-row>
        <table:table-row>
          <table:table-cell table:style-name="Tableau1.A1" office:value-type="string">
            <text:p text:style-name="Table_20_Contents"><text:span text:style-name="Strong_20_Emphasis">Budget Contraint</text:span> (Stack Open-Source)</text:p>
          </table:table-cell>
          <table:table-cell table:style-name="Tableau1.A1" office:value-type="string">
            <text:p text:style-name="Table_20_Contents">Nginx, PostgreSQL, Nextcloud, Samba, Wazuh, WireGuard</text:p>
          </table:table-cell>
          <table:table-cell table:style-name="Tableau1.A1" office:value-type="string">
            <text:p text:style-name="Table_20_Contents">Vous proposez une solution de niveau professionnel, mais sans coût de licence, ce qui est un argument de poids pour une ONG.</text:p>
          </table:table-cell>
        </table:table-row>
      </table:table>
      <text:p text:style-name="Text_20_body">En structurant ainsi votre projet, vous démontrez que vous ne construisez pas une infrastructure "technique" dans le vide, mais une réponse concrète, éthique et réaliste aux enjeux de sécurité que vos ONG clientes vivent au quotidi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6-17T10:44:34.088000000</meta:creation-date>
    <dc:date>2026-06-17T10:45:05.270000000</dc:date>
    <meta:editing-duration>PT31S</meta:editing-duration>
    <meta:editing-cycles>1</meta:editing-cycles>
    <meta:document-statistic meta:table-count="1" meta:image-count="0" meta:object-count="0" meta:page-count="3" meta:paragraph-count="49" meta:word-count="1034" meta:character-count="6342" meta:non-whitespace-character-count="5373"/>
    <meta:generator>LibreOffice/5.4.0.3$Windows_X86_64 LibreOffice_project/7556cbc6811c9d992f4064ab9287069087d7f62c</meta:generator>
  </office:meta>
</office:document-meta>
</file>