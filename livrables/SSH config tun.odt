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6cm" table:align="left"/>
    </style:style>
    <style:style style:name="Tableau1.A" style:family="table-column">
      <style:table-column-properties style:column-width="4.142cm"/>
    </style:style>
    <style:style style:name="Tableau1.B" style:family="table-column">
      <style:table-column-properties style:column-width="2.304cm"/>
    </style:style>
    <style:style style:name="Tableau1.C" style:family="table-column">
      <style:table-column-properties style:column-width="4.791cm"/>
    </style:style>
    <style:style style:name="Tableau1.D" style:family="table-column">
      <style:table-column-properties style:column-width="5.4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685cm"/>
    </style:style>
    <style:style style:name="Tableau2.B" style:family="table-column">
      <style:table-column-properties style:column-width="14.316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erci pour ces précisions. Maintenant, je comprends parfaitement votre architecture réseau.</text:p>
      <text:p text:style-name="Text_20_body">Voici comment adapter et utiliser la méthode <text:span text:style-name="Source_20_Text">sshuttle</text:span> pour la phase de pentest, en exploitant votre configuration.</text:p>
      <text:p text:style-name="Horizontal_20_Line"/>
      <text:h text:style-name="Heading_20_2" text:outline-level="2">🧭 Récapitulatif de votre architecture réseau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Équipement</text:p>
            </table:table-cell>
            <table:table-cell table:style-name="Tableau1.A1" office:value-type="string">
              <text:p text:style-name="Table_20_Heading">Interface</text:p>
            </table:table-cell>
            <table:table-cell table:style-name="Tableau1.A1" office:value-type="string">
              <text:p text:style-name="Table_20_Heading">Adresse IP</text:p>
            </table:table-cell>
            <table:table-cell table:style-name="Tableau1.A1" office:value-type="string">
              <text:p text:style-name="Table_20_Heading">Réseau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fSense-1 (MASTER)</text:span></text:p>
          </table:table-cell>
          <table:table-cell table:style-name="Tableau1.A1" office:value-type="string">
            <text:p text:style-name="Table_20_Contents">WAN (em0)</text:p>
          </table:table-cell>
          <table:table-cell table:style-name="Tableau1.A1" office:value-type="string">
            <text:p text:style-name="Table_20_Contents"><text:span text:style-name="Source_20_Text">192.168.122.200/24</text:span></text:p>
          </table:table-cell>
          <table:table-cell table:style-name="Tableau1.A1" office:value-type="string">
            <text:p text:style-name="Table_20_Contents">Réseau NAT GNS3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>LAN (em1)</text:p>
          </table:table-cell>
          <table:table-cell table:style-name="Tableau1.A1" office:value-type="string">
            <text:p text:style-name="Table_20_Contents"><text:span text:style-name="Source_20_Text">192.168.1.1/24</text:span></text:p>
          </table:table-cell>
          <table:table-cell table:style-name="Tableau1.A1" office:value-type="string">
            <text:p text:style-name="Table_20_Contents">Réseau interne Lyon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>OPT1 (em2)</text:p>
          </table:table-cell>
          <table:table-cell table:style-name="Tableau1.A1" office:value-type="string">
            <text:p text:style-name="Table_20_Contents"><text:span text:style-name="Source_20_Text">10.255.255.1/24</text:span></text:p>
          </table:table-cell>
          <table:table-cell table:style-name="Tableau1.A1" office:value-type="string">
            <text:p text:style-name="Table_20_Contents">PFSYNC (HA)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>OPT2 (em3)</text:p>
          </table:table-cell>
          <table:table-cell table:style-name="Tableau1.A1" office:value-type="string">
            <text:p text:style-name="Table_20_Contents"><text:span text:style-name="Source_20_Text">10.0.0.1/24</text:span></text:p>
          </table:table-cell>
          <table:table-cell table:style-name="Tableau1.A1" office:value-type="string">
            <text:p text:style-name="Table_20_Contents">WireGuard (VPN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fSense-2 (BACKUP)</text:span></text:p>
          </table:table-cell>
          <table:table-cell table:style-name="Tableau1.A1" office:value-type="string">
            <text:p text:style-name="Table_20_Contents">WAN (em0)</text:p>
          </table:table-cell>
          <table:table-cell table:style-name="Tableau1.A1" office:value-type="string">
            <text:p text:style-name="Table_20_Contents"><text:span text:style-name="Source_20_Text">192.168.122.32/24</text:span></text:p>
          </table:table-cell>
          <table:table-cell table:style-name="Tableau1.A1" office:value-type="string">
            <text:p text:style-name="Table_20_Contents">Réseau NAT GNS3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>LAN (em1)</text:p>
          </table:table-cell>
          <table:table-cell table:style-name="Tableau1.A1" office:value-type="string">
            <text:p text:style-name="Table_20_Contents"><text:span text:style-name="Source_20_Text">192.168.1.2/24</text:span></text:p>
          </table:table-cell>
          <table:table-cell table:style-name="Tableau1.A1" office:value-type="string">
            <text:p text:style-name="Table_20_Contents">Réseau interne Lyon (Backup)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>OPT1 (em2)</text:p>
          </table:table-cell>
          <table:table-cell table:style-name="Tableau1.A1" office:value-type="string">
            <text:p text:style-name="Table_20_Contents"><text:span text:style-name="Source_20_Text">10.255.255.2/24</text:span></text:p>
          </table:table-cell>
          <table:table-cell table:style-name="Tableau1.A1" office:value-type="string">
            <text:p text:style-name="Table_20_Contents">PFSYNC (HA)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>OPT2 (em3)</text:p>
          </table:table-cell>
          <table:table-cell table:style-name="Tableau1.A1" office:value-type="string">
            <text:p text:style-name="Table_20_Contents"><text:span text:style-name="Source_20_Text">10.0.0.2/24</text:span></text:p>
          </table:table-cell>
          <table:table-cell table:style-name="Tableau1.A1" office:value-type="string">
            <text:p text:style-name="Table_20_Contents">WireGuard (VPN)</text:p>
          </table:table-cell>
        </table:table-row>
      </table:table>
      <text:p text:style-name="Horizontal_20_Line"/>
      <text:h text:style-name="Heading_20_2" text:outline-level="2">🎯 Objectif de la commande <text:span text:style-name="Source_20_Text">sshuttle</text:span></text:h>
      <text:p text:style-name="Text_20_body">Votre professeur vous a partagé cette méthode pour <text:span text:style-name="Strong_20_Emphasis">exposer les réseaux internes de votre labo</text:span> (comme <text:span text:style-name="Source_20_Text">192.168.1.0/24</text:span>) depuis votre machine locale, afin de réaliser des tests de pénétration.</text:p>
      <text:p text:style-name="Horizontal_20_Line"/>
      <text:h text:style-name="Heading_20_2" text:outline-level="2">🛠️ Commandes adaptées pour votre labo</text:h>
      <text:h text:style-name="Heading_20_3" text:outline-level="3">1. Sur le serveur GNS3 (<text:span text:style-name="Source_20_Text">192.168.145.154</text:span>)</text:h>
      <text:p text:style-name="Text_20_body">Vous devez ajouter des routes vers vos réseaux internes via le <text:span text:style-name="Strong_20_Emphasis">WAN de pfSense-1</text:span> (<text:span text:style-name="Source_20_Text">192.168.122.200</text:span>), car c'est la passerelle qui connecte le labo au réseau NAT GNS3.</text:p>
      <text:p text:style-name="Text_20_body">bash</text:p>
      <text:p text:style-name="Preformatted_20_Text">sudo ip route replace 192.168.1.0/24 via 192.168.122.200</text:p>
      <text:p text:style-name="Preformatted_20_Text">sudo ip route replace 10.255.255.0/24 via 192.168.122.200</text:p>
      <text:p text:style-name="P4">sudo ip route replace 10.0.0.0/24 via 192.168.122.200</text:p>
      <text:p text:style-name="Text_20_body"><text:span text:style-name="Strong_20_Emphasis">Explication :</text:span></text:p>
      <text:list xml:id="list132014732" text:style-name="L1">
        <text:list-item>
          <text:p text:style-name="P1"><text:span text:style-name="Source_20_Text">192.168.1.0/24</text:span> : le réseau LAN de vos VMs Lyon.</text:p>
        </text:list-item>
        <text:list-item>
          <text:p text:style-name="P1"><text:span text:style-name="Source_20_Text">10.255.255.0/24</text:span> : le réseau PFSYNC (moins critique mais utile).</text:p>
        </text:list-item>
        <text:list-item>
          <text:p text:style-name="P1"><text:span text:style-name="Source_20_Text">10.0.0.0/24</text:span> : le réseau WireGuard (si vous voulez tester le VPN).</text:p>
        </text:list-item>
      </text:list>
      <text:p text:style-name="Horizontal_20_Line"/>
      <text:h text:style-name="Heading_20_3" text:outline-level="3"><text:soft-page-break/>2. Sur votre machine locale</text:h>
      <text:p text:style-name="Text_20_body">Lancez <text:span text:style-name="Source_20_Text">sshuttle</text:span> pour créer le tunnel VPN vers le serveur GNS3, en exposant les réseaux que vous venez de router.</text:p>
      <text:p text:style-name="Text_20_body">bash</text:p>
      <text:p text:style-name="P4">sshuttle -r gns3@192.168.145.154 192.168.1.0/24 10.255.255.0/24 10.0.0.0/24 192.168.122.0/24</text:p>
      <text:p text:style-name="Text_20_body"><text:span text:style-name="Strong_20_Emphasis">Explication :</text:span></text:p>
      <text:list xml:id="list3286328757" text:style-name="L2">
        <text:list-item>
          <text:p text:style-name="P2"><text:span text:style-name="Source_20_Text">-r gns3@192.168.145.154</text:span> : se connecte au serveur GNS3 via SSH.</text:p>
        </text:list-item>
        <text:list-item>
          <text:p text:style-name="P2"><text:span text:style-name="Source_20_Text">192.168.1.0/24</text:span> : expose votre réseau interne Lyon.</text:p>
        </text:list-item>
        <text:list-item>
          <text:p text:style-name="P2"><text:span text:style-name="Source_20_Text">10.255.255.0/24</text:span> : expose le réseau PFSYNC.</text:p>
        </text:list-item>
        <text:list-item>
          <text:p text:style-name="P2"><text:span text:style-name="Source_20_Text">10.0.0.0/24</text:span> : expose le réseau WireGuard.</text:p>
        </text:list-item>
        <text:list-item>
          <text:p text:style-name="P2"><text:span text:style-name="Source_20_Text">192.168.122.0/24</text:span> : expose le réseau NAT GNS3 lui-même (pour accéder aux pfSense via WAN).</text:p>
        </text:list-item>
      </text:list>
      <text:p text:style-name="Horizontal_20_Line"/>
      <text:h text:style-name="Heading_20_2" text:outline-level="2">🧪 Test de connectivité</text:h>
      <text:p text:style-name="Text_20_body">Une fois <text:span text:style-name="Source_20_Text">sshuttle</text:span> lancé, depuis votre machine locale, testez :</text:p>
      <text:p text:style-name="Text_20_body">bash</text:p>
      <text:p text:style-name="Preformatted_20_Text"># Accès au pfSense-1</text:p>
      <text:p text:style-name="Preformatted_20_Text">ping 192.168.122.200 <text:s text:c="2"/># WAN</text:p>
      <text:p text:style-name="Preformatted_20_Text">ping 192.168.1.1 <text:s text:c="6"/># LAN</text:p>
      <text:p text:style-name="Preformatted_20_Text"/>
      <text:p text:style-name="Preformatted_20_Text"># Accès au pfSense-2</text:p>
      <text:p text:style-name="Preformatted_20_Text">ping 192.168.122.32 <text:s text:c="3"/># WAN</text:p>
      <text:p text:style-name="Preformatted_20_Text">ping 192.168.1.2 <text:s text:c="6"/># LAN</text:p>
      <text:p text:style-name="Preformatted_20_Text"/>
      <text:p text:style-name="Preformatted_20_Text"># Accès à vos VMs (ex: Wazuh)</text:p>
      <text:p text:style-name="Preformatted_20_Text">ping 192.168.1.50 <text:s text:c="5"/># Wazuh Manager</text:p>
      <text:p text:style-name="Preformatted_20_Text"/>
      <text:p text:style-name="Preformatted_20_Text"># Accès à d'autres VMs</text:p>
      <text:p text:style-name="Preformatted_20_Text">ping 192.168.1.10 <text:s text:c="5"/># Web</text:p>
      <text:p text:style-name="Preformatted_20_Text">ping 192.168.1.20 <text:s text:c="5"/># DB</text:p>
      <text:p text:style-name="Preformatted_20_Text">ping 192.168.1.30 <text:s text:c="5"/># Nextcloud</text:p>
      <text:p text:style-name="P4">ping 192.168.1.40 <text:s text:c="5"/># DC</text:p>
      <text:p text:style-name="Text_20_body"><text:span text:style-name="Strong_20_Emphasis">Si les pings fonctionnent</text:span>, c'est que votre tunnel est opérationnel et vous pouvez commencer vos scans.</text:p>
      <text:p text:style-name="Horizontal_20_Line"/>
      <text:h text:style-name="Heading_20_2" text:outline-level="2">🔥 Pour la phase de pentest</text:h>
      <text:p text:style-name="Text_20_body">Avec ce tunnel, vous pouvez utiliser vos outils locaux (nmap, Burp Suite, Metasploit, etc.) comme si vous étiez dans le réseau interne.</text:p>
      <text:p text:style-name="Text_20_body"><text:soft-page-break/><text:span text:style-name="Strong_20_Emphasis">Exemple :</text:span></text:p>
      <text:p text:style-name="Text_20_body">bash</text:p>
      <text:p text:style-name="Preformatted_20_Text"># Scanner le réseau Lyon depuis votre machine</text:p>
      <text:p text:style-name="Preformatted_20_Text">nmap -sV 192.168.1.0/24</text:p>
      <text:p text:style-name="Preformatted_20_Text"/>
      <text:p text:style-name="Preformatted_20_Text"># Scanner un service spécifique</text:p>
      <text:p text:style-name="P4">nmap -p 443 192.168.1.50</text:p>
      <text:p text:style-name="Horizontal_20_Line"/>
      <text:h text:style-name="Heading_20_2" text:outline-level="2">⚠️ Points d'attention pour demain</text:h>
      <text:list xml:id="list116510627" text:style-name="L3">
        <text:list-item>
          <text:p text:style-name="P3"><text:span text:style-name="Strong_20_Emphasis">Vérifiez que les routes persistent</text:span> sur le serveur GNS3 (si besoin, mettez-les dans un script).</text:p>
        </text:list-item>
        <text:list-item>
          <text:p text:style-name="P3"><text:span text:style-name="Strong_20_Emphasis">Assurez-vous que le pare-feu pfSense</text:span> autorise le trafic entrant sur le WAN (<text:span text:style-name="Source_20_Text">192.168.122.200</text:span>) vers le LAN (<text:span text:style-name="Source_20_Text">192.168.1.0/24</text:span>).</text:p>
          <text:list>
            <text:list-item>
              <text:p text:style-name="P3">Par défaut, pfSense bloque tout sur WAN. Si c'est le cas, ajoutez une règle "Pass" temporaire pour les tests (ou utilisez le LAN directement).</text:p>
            </text:list-item>
          </text:list>
        </text:list-item>
        <text:list-item>
          <text:p text:style-name="P3"><text:span text:style-name="Strong_20_Emphasis">Protégez vos données</text:span> : si vous exposez des services sensibles, désactivez-les ou isolez-les si nécessaire.</text:p>
        </text:list-item>
        <text:list-item>
          <text:p text:style-name="P3"><text:span text:style-name="Strong_20_Emphasis">Préparez vos outils</text:span> : installez <text:span text:style-name="Source_20_Text">nmap</text:span>, <text:span text:style-name="Source_20_Text">dirb</text:span>, <text:span text:style-name="Source_20_Text">hydra</text:span>, etc. sur votre machine locale si ce n'est pas déjà fait.</text:p>
        </text:list-item>
      </text:list>
      <text:p text:style-name="Horizontal_20_Line"/>
      <text:h text:style-name="Heading_20_2" text:outline-level="2">📋 Résumé des commandes à exécuter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Où</text:p>
            </table:table-cell>
            <table:table-cell table:style-name="Tableau2.A1" office:value-type="string">
              <text:p text:style-name="Table_20_Heading">Command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Serveur GNS3</text:span></text:p>
          </table:table-cell>
          <table:table-cell table:style-name="Tableau2.A1" office:value-type="string">
            <text:p text:style-name="Table_20_Contents"><text:span text:style-name="Source_20_Text">sudo ip route replace 192.168.1.0/24 via 192.168.122.200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Machine locale</text:span></text:p>
          </table:table-cell>
          <table:table-cell table:style-name="Tableau2.A1" office:value-type="string">
            <text:p text:style-name="Table_20_Contents"><text:span text:style-name="Source_20_Text">sshuttle -r gns3@192.168.145.154 192.168.1.0/24 192.168.122.0/24</text:span></text:p>
          </table:table-cell>
        </table:table-row>
      </table:table>
      <text:p text:style-name="Horizontal_20_Line"/>
      <text:p text:style-name="Text_20_body"><text:span text:style-name="Strong_20_Emphasis">N'hésitez pas à tester dès maintenant et à me dire si les pings fonctionnent.</text:span> Bon courage pour la phase de pentest !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3T17:28:54.579000000</meta:creation-date>
    <dc:date>2026-06-23T17:30:09.709000000</dc:date>
    <meta:editing-duration>PT1M16S</meta:editing-duration>
    <meta:editing-cycles>1</meta:editing-cycles>
    <meta:document-statistic meta:table-count="2" meta:image-count="0" meta:object-count="0" meta:page-count="3" meta:paragraph-count="95" meta:word-count="586" meta:character-count="3762" meta:non-whitespace-character-count="3242"/>
    <meta:generator>LibreOffice/5.4.0.3$Windows_X86_64 LibreOffice_project/7556cbc6811c9d992f4064ab9287069087d7f62c</meta:generator>
  </office:meta>
</office:document-meta>
</file>