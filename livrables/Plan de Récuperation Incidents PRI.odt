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079cm" table:align="left"/>
    </style:style>
    <style:style style:name="Tableau1.A" style:family="table-column">
      <style:table-column-properties style:column-width="1.584cm"/>
    </style:style>
    <style:style style:name="Tableau1.B" style:family="table-column">
      <style:table-column-properties style:column-width="2.369cm"/>
    </style:style>
    <style:style style:name="Tableau1.C" style:family="table-column">
      <style:table-column-properties style:column-width="3.133cm"/>
    </style:style>
    <style:style style:name="Tableau1.D" style:family="table-column">
      <style:table-column-properties style:column-width="2.99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4.57cm"/>
    </style:style>
    <style:style style:name="Tableau2.B" style:family="table-column">
      <style:table-column-properties style:column-width="3.537cm"/>
    </style:style>
    <style:style style:name="Tableau2.C" style:family="table-column">
      <style:table-column-properties style:column-width="8.89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2.427cm"/>
    </style:style>
    <style:style style:name="Tableau3.B" style:family="table-column">
      <style:table-column-properties style:column-width="7.472cm"/>
    </style:style>
    <style:style style:name="Tableau3.C" style:family="table-column">
      <style:table-column-properties style:column-width="2.341cm"/>
    </style:style>
    <style:style style:name="Tableau3.D" style:family="table-column">
      <style:table-column-properties style:column-width="4.761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🛡️ PLAN DE RÉPONSE AUX INCIDENTS (PRI)</text:h>
      <text:h text:style-name="Heading_20_2" text:outline-level="2">ONGarde - Protéger ceux qui protègent les autr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<text:span text:style-name="Strong_20_Emphasis">Version</text:span></text:p>
            </table:table-cell>
            <table:table-cell table:style-name="Tableau1.A1" office:value-type="string">
              <text:p text:style-name="Table_20_Heading"><text:span text:style-name="Strong_20_Emphasis">Date</text:span></text:p>
            </table:table-cell>
            <table:table-cell table:style-name="Tableau1.A1" office:value-type="string">
              <text:p text:style-name="Table_20_Heading"><text:span text:style-name="Strong_20_Emphasis">Auteur</text:span></text:p>
            </table:table-cell>
            <table:table-cell table:style-name="Tableau1.A1" office:value-type="string">
              <text:p text:style-name="Table_20_Heading"><text:span text:style-name="Strong_20_Emphasis">Modifications</text:span></text:p>
            </table:table-cell>
          </table:table-row>
        </table:table-header-rows>
        <table:table-row>
          <table:table-cell table:style-name="Tableau1.A1" office:value-type="string">
            <text:p text:style-name="Table_20_Contents">1.0</text:p>
          </table:table-cell>
          <table:table-cell table:style-name="Tableau1.A1" office:value-type="string">
            <text:p text:style-name="Table_20_Contents">26 Juin 2026</text:p>
          </table:table-cell>
          <table:table-cell table:style-name="Tableau1.A1" office:value-type="string">
            <text:p text:style-name="Table_20_Contents">Équipe ONGarde</text:p>
          </table:table-cell>
          <table:table-cell table:style-name="Tableau1.A1" office:value-type="string">
            <text:p text:style-name="Table_20_Contents">Création initiale</text:p>
          </table:table-cell>
        </table:table-row>
      </table:table>
      <text:p text:style-name="Horizontal_20_Line"/>
      <text:h text:style-name="Heading_20_3" text:outline-level="3">1. OBJECTIF ET PÉRIMÈTRE</text:h>
      <text:p text:style-name="Text_20_body">Ce plan définit les procédures à suivre pour <text:span text:style-name="Strong_20_Emphasis">détecter, analyser, contenir, éradiquer et récupérer</text:span> d'un incident de cybersécurité affectant l'infrastructure d'ONGarde . Il vise à :</text:p>
      <text:list xml:id="list2475314218" text:style-name="L1">
        <text:list-item>
          <text:p text:style-name="P1"><text:span text:style-name="Strong_20_Emphasis">Minimiser l'impact</text:span> opérationnel, financier et réputationnel sur l'ONG et les organisations qu'elle protège.</text:p>
        </text:list-item>
        <text:list-item>
          <text:p text:style-name="P1"><text:span text:style-name="Strong_20_Emphasis">Assurer une réponse coordonnée et efficace</text:span>, même en situation de stress.</text:p>
        </text:list-item>
        <text:list-item>
          <text:p text:style-name="P1"><text:span text:style-name="Strong_20_Emphasis">Préserver les preuves</text:span> pour une analyse forensique et d'éventuelles poursuites judiciaires .</text:p>
        </text:list-item>
        <text:list-item>
          <text:p text:style-name="P1"><text:span text:style-name="Strong_20_Emphasis">Garantir la conformité</text:span> avec le RGPD et autres obligations légales en matière de notification de violations de données .</text:p>
        </text:list-item>
        <text:list-item>
          <text:p text:style-name="P1"><text:span text:style-name="Strong_20_Emphasis">Protéger la mission humanitaire</text:span> en rétablissant les services critiques dans les meilleurs délais .</text:p>
        </text:list-item>
      </text:list>
      <text:p text:style-name="Text_20_body"><text:span text:style-name="Strong_20_Emphasis">Périmètre :</text:span> Ce plan couvre tous les actifs informatiques d'ONGarde, y compris les sites de Lyon et Marseille, les VMs, les données sensibles (donateurs, bénéficiaires), et les services critiques (Nextcloud, base de données, authentification).</text:p>
      <text:p text:style-name="Horizontal_20_Line"/>
      <text:h text:style-name="Heading_20_3" text:outline-level="3">2. ÉQUIPE DE RÉPONSE AUX INCIDENTS (CSIRT)</text:h>
      <text:p text:style-name="Text_20_body">L'équipe est pluridisciplinaire pour couvrir tous les aspects techniques, juridiques et de communication d'un incident. Elle est activée dès la confirmation d'un incident majeur 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<text:span text:style-name="Strong_20_Emphasis">Rôle</text:span></text:p>
            </table:table-cell>
            <table:table-cell table:style-name="Tableau2.A1" office:value-type="string">
              <text:p text:style-name="Table_20_Heading"><text:span text:style-name="Strong_20_Emphasis">Responsable (Nom)</text:span></text:p>
            </table:table-cell>
            <table:table-cell table:style-name="Tableau2.A1" office:value-type="string">
              <text:p text:style-name="Table_20_Heading"><text:span text:style-name="Strong_20_Emphasis">Responsabilités Clés</text:span>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Directeur de la Réponse</text:span></text:p>
          </table:table-cell>
          <table:table-cell table:style-name="Tableau2.A1" office:value-type="string">
            <text:p text:style-name="Table_20_Contents">Chef de Projet (Franck R.)</text:p>
          </table:table-cell>
          <table:table-cell table:style-name="Tableau2.A1" office:value-type="string">
            <text:p text:style-name="Table_20_Contents">• Décisions stratégiques &amp; escalade. <text:line-break/>• Communication avec la direction et les parties prenantes externes (donateurs, ONG clientes). <text:line-break/>• Allocation des ressource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Coordinateur d'Incident</text:span></text:p>
          </table:table-cell>
          <table:table-cell table:style-name="Tableau2.A1" office:value-type="string">
            <text:p text:style-name="Table_20_Contents">Lead Sécurité (Jean D.)</text:p>
          </table:table-cell>
          <table:table-cell table:style-name="Tableau2.A1" office:value-type="string">
            <text:p text:style-name="Table_20_Contents">• Coordination des actions de l'équipe. <text:line-break/>• Maintien du journal de bord de l'incident (chronologie, actions). <text:line-break/>• Point de contact principal pour le CSIRT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Analyste Sécurité / Forensics</text:span></text:p>
          </table:table-cell>
          <table:table-cell table:style-name="Tableau2.A1" office:value-type="string">
            <text:p text:style-name="Table_20_Contents">Lead Infrastructure (Muriel H.)</text:p>
          </table:table-cell>
          <table:table-cell table:style-name="Tableau2.A1" office:value-type="string">
            <text:p text:style-name="Table_20_Contents">• Analyse des alertes Wazuh et investigation technique. <text:line-break/><text:soft-page-break/>• Collecte et préservation des preuves (logs, images disque). <text:line-break/>• Recommandations techniques pour le confinement et l'éradication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Expert Technique (Systèmes &amp; Réseaux)</text:span></text:p>
          </table:table-cell>
          <table:table-cell table:style-name="Tableau2.A1" office:value-type="string">
            <text:p text:style-name="Table_20_Contents">Lead Services (Valentina M.)</text:p>
          </table:table-cell>
          <table:table-cell table:style-name="Tableau2.A1" office:value-type="string">
            <text:p text:style-name="Table_20_Contents">• Mise en œuvre pratique du confinement (isolation des VMs, modification des règles de pare-feu). <text:line-break/>• Restauration des systèmes à partir des sauvegardes. <text:line-break/>• Correction des vulnérabilité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Responsable Juridique &amp; Conformité</text:span></text:p>
          </table:table-cell>
          <table:table-cell table:style-name="Tableau2.A1" office:value-type="string">
            <text:p text:style-name="Table_20_Contents">(À définir - ex: membre externe)</text:p>
          </table:table-cell>
          <table:table-cell table:style-name="Tableau2.A1" office:value-type="string">
            <text:p text:style-name="Table_20_Contents">• Évaluation des obligations légales (RGPD, notifications à la CNIL). <text:line-break/>• Gestion des risques juridiques. <text:line-break/>• Interface avec les autorités si nécessaire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Responsable Communication</text:span></text:p>
          </table:table-cell>
          <table:table-cell table:style-name="Tableau2.A1" office:value-type="string">
            <text:p text:style-name="Table_20_Contents">(À définir - ex: membre externe)</text:p>
          </table:table-cell>
          <table:table-cell table:style-name="Tableau2.A1" office:value-type="string">
            <text:p text:style-name="Table_20_Contents">• Élaboration des messages internes et externes (communiqués de presse, communication avec les ONG clientes). <text:line-break/>• Gestion de la réputation.</text:p>
          </table:table-cell>
        </table:table-row>
      </table:table>
      <text:p text:style-name="Horizontal_20_Line"/>
      <text:h text:style-name="Heading_20_3" text:outline-level="3">3. TYPES D'INCIDENTS ET NIVEAUX DE GRAVITÉ</text:h>
      <text:p text:style-name="Text_20_body">La gravité détermine le niveau de réponse et l'escalade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<text:span text:style-name="Strong_20_Emphasis">Niveau</text:span></text:p>
            </table:table-cell>
            <table:table-cell table:style-name="Tableau3.A1" office:value-type="string">
              <text:p text:style-name="Table_20_Heading"><text:span text:style-name="Strong_20_Emphasis">Critères</text:span></text:p>
            </table:table-cell>
            <table:table-cell table:style-name="Tableau3.A1" office:value-type="string">
              <text:p text:style-name="Table_20_Heading"><text:span text:style-name="Strong_20_Emphasis">Délai de Réponse</text:span></text:p>
            </table:table-cell>
            <table:table-cell table:style-name="Tableau3.A1" office:value-type="string">
              <text:p text:style-name="Table_20_Heading"><text:span text:style-name="Strong_20_Emphasis">Escalade</text:span>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🟢 Faible</text:span></text:p>
          </table:table-cell>
          <table:table-cell table:style-name="Tableau3.A1" office:value-type="string">
            <text:p text:style-name="Table_20_Contents">• Événement isolé sans impact avéré. <text:line-break/>• Ex : tentative de phishing sur un compte bénévole, faux positif Wazuh.</text:p>
          </table:table-cell>
          <table:table-cell table:style-name="Tableau3.A1" office:value-type="string">
            <text:p text:style-name="Table_20_Contents">48h</text:p>
          </table:table-cell>
          <table:table-cell table:style-name="Tableau3.A1" office:value-type="string">
            <text:p text:style-name="Table_20_Contents">Équipe technique uniquement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🟡 Moyen</text:span></text:p>
          </table:table-cell>
          <table:table-cell table:style-name="Tableau3.A1" office:value-type="string">
            <text:p text:style-name="Table_20_Contents">• Impact limité à un petit nombre de systèmes non critiques. <text:line-break/>• Ex : compromission d'un poste de travail, déni de service limité.</text:p>
          </table:table-cell>
          <table:table-cell table:style-name="Tableau3.A1" office:value-type="string">
            <text:p text:style-name="Table_20_Contents">24h</text:p>
          </table:table-cell>
          <table:table-cell table:style-name="Tableau3.A1" office:value-type="string">
            <text:p text:style-name="Table_20_Contents">CSIRT complet informé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🟠 Élevé</text:span></text:p>
          </table:table-cell>
          <table:table-cell table:style-name="Tableau3.A1" office:value-type="string">
            <text:p text:style-name="Table_20_Contents">• Impact significatif sur les opérations ou les données sensibles. <text:line-break/>• Ex : compromission de <text:span text:style-name="Source_20_Text">lyon-web</text:span>, tentative de ransomware, fuite de données interne.</text:p>
          </table:table-cell>
          <table:table-cell table:style-name="Tableau3.A1" office:value-type="string">
            <text:p text:style-name="Table_20_Contents">4h</text:p>
          </table:table-cell>
          <table:table-cell table:style-name="Tableau3.A1" office:value-type="string">
            <text:p text:style-name="Table_20_Contents">CSIRT complet activé. Direction informée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🔴 Critique</text:span></text:p>
          </table:table-cell>
          <table:table-cell table:style-name="Tableau3.A1" office:value-type="string">
            <text:p text:style-name="Table_20_Contents">• Perte de données majeure (donateurs, bénéficiaires). <text:line-break/>• Indisponibilité des services critiques (Nextcloud, authentification). <text:line-break/>• Attaque par ransomware en cours. <text:line-break/>• Menace pour la sécurité physique des bénéficiaires.</text:p>
          </table:table-cell>
          <table:table-cell table:style-name="Tableau3.A1" office:value-type="string">
            <text:p text:style-name="Table_20_Contents">Immédiat (1h)</text:p>
          </table:table-cell>
          <table:table-cell table:style-name="Tableau3.A1" office:value-type="string">
            <text:p text:style-name="Table_20_Contents">• CSIRT complet en état d'urgence. <text:line-break/>• Direction générale et juridique impliquées. <text:line-break/>• Préparation des notifications réglementaires.</text:p>
          </table:table-cell>
        </table:table-row>
      </table:table>
      <text:p text:style-name="Horizontal_20_Line"/>
      <text:h text:style-name="Heading_20_3" text:outline-level="3">4. PROCÉDURE DE RÉPONSE (6 PHASES)</text:h>
      <text:p text:style-name="Text_20_body">Notre processus s'inspire du modèle SANS, adapté à notre contexte .</text:p>
      <text:h text:style-name="Heading_20_4" text:outline-level="4"><text:soft-page-break/>Phase 1 : 🛠️ PRÉPARATION (Avant l'incident)</text:h>
      <text:p text:style-name="Text_20_body">C'est la phase la plus importante. Notre préparation comprend :</text:p>
      <text:list xml:id="list4205826952" text:style-name="L2">
        <text:list-item>
          <text:p text:style-name="P2"><text:span text:style-name="Strong_20_Emphasis">Infrastructure :</text:span> Wazuh pour la détection, sauvegardes automatisées (3-2-1), pare-feu (UFW/pfSense), VPN, MFA.</text:p>
        </text:list-item>
        <text:list-item>
          <text:p text:style-name="P2"><text:span text:style-name="Strong_20_Emphasis">Documentation :</text:span> Ce plan de réponse, les playbooks (procédures détaillées pour chaque type d'incident), la documentation de l'architecture .</text:p>
        </text:list-item>
        <text:list-item>
          <text:p text:style-name="P2"><text:span text:style-name="Strong_20_Emphasis">Équipe :</text:span> Formation des membres du CSIRT sur leurs rôles et sur les outils.</text:p>
        </text:list-item>
        <text:list-item>
          <text:p text:style-name="P2"><text:span text:style-name="Strong_20_Emphasis">Outils :</text:span> "Jump bag" numérique avec accès sécurisé aux logs, aux backups, et outils d'analyse.</text:p>
        </text:list-item>
        <text:list-item>
          <text:p text:style-name="P2"><text:span text:style-name="Strong_20_Emphasis">Exercices :</text:span> Simulations annuelles (ex: attaque par ransomware) pour tester le plan .</text:p>
        </text:list-item>
      </text:list>
      <text:h text:style-name="Heading_20_4" text:outline-level="4">Phase 2 : 🔎 IDENTIFICATION (Détection et Analyse)</text:h>
      <text:list xml:id="list3308006101" text:style-name="L3">
        <text:list-item>
          <text:p text:style-name="P3"><text:span text:style-name="Strong_20_Emphasis">Détection :</text:span> Wazuh nous alerte via Kibana sur des comportements suspects (bruteforce, accès anormal, modifications de fichiers systèmes, alertes de sécurité) .</text:p>
        </text:list-item>
        <text:list-item>
          <text:p text:style-name="P3"><text:span text:style-name="Strong_20_Emphasis">Analyse :</text:span></text:p>
          <text:list>
            <text:list-item>
              <text:p text:style-name="P3"><text:span text:style-name="Strong_20_Emphasis">Réception :</text:span> Un analyste confirme l'alerte.</text:p>
            </text:list-item>
            <text:list-item>
              <text:p text:style-name="P3"><text:span text:style-name="Strong_20_Emphasis">Tri :</text:span> L'analyste rassemble des informations (source IP, type d'événement, logs associés).</text:p>
            </text:list-item>
            <text:list-item>
              <text:p text:style-name="P3"><text:span text:style-name="Strong_20_Emphasis">Détermination :</text:span> S'agit-il d'un faux positif ou d'un incident réel ? La gravité est évaluée.</text:p>
            </text:list-item>
            <text:list-item>
              <text:p text:style-name="P3"><text:span text:style-name="Strong_20_Emphasis">Documentation :</text:span> Le coordinateur ouvre un "Incident ID" et commence le journal de bord.</text:p>
            </text:list-item>
          </text:list>
        </text:list-item>
      </text:list>
      <text:h text:style-name="Heading_20_4" text:outline-level="4">Phase 3 : 🧯 CONFINEMENT (Limiter les dégâts)</text:h>
      <text:list xml:id="list2235787049" text:style-name="L4">
        <text:list-item>
          <text:p text:style-name="P4"><text:span text:style-name="Strong_20_Emphasis">Objectif :</text:span> Empêcher la propagation de la menace .</text:p>
        </text:list-item>
        <text:list-item>
          <text:p text:style-name="P4"><text:span text:style-name="Strong_20_Emphasis">Actions (selon l'incident) :</text:span></text:p>
          <text:list>
            <text:list-item>
              <text:p text:style-name="P4"><text:span text:style-name="Strong_20_Emphasis">Confinement à court terme :</text:span> Isoler immédiatement la machine compromise du réseau (via GNS3 ou pare-feu). Ex: <text:span text:style-name="Source_20_Text">sudo ufw deny from &lt;IP_attaquante&gt;</text:span>.</text:p>
            </text:list-item>
            <text:list-item>
              <text:p text:style-name="P4"><text:span text:style-name="Strong_20_Emphasis">Confinement à long terme :</text:span> Mettre en place des règles de pare-feu plus strictes, changer les mots de passe compromis, déconnecter le service VPN.</text:p>
            </text:list-item>
            <text:list-item>
              <text:p text:style-name="P4"><text:span text:style-name="Strong_20_Emphasis">Préservation des preuves :</text:span> Faire une copie forensique de la VM ou des disques avant toute action corrective .</text:p>
            </text:list-item>
          </text:list>
        </text:list-item>
      </text:list>
      <text:h text:style-name="Heading_20_4" text:outline-level="4">Phase 4 : 🗑️ ÉRADICATION (Supprimer la menace)</text:h>
      <text:list xml:id="list925439138" text:style-name="L5">
        <text:list-item>
          <text:p text:style-name="P5"><text:span text:style-name="Strong_20_Emphasis">Objectif :</text:span> Nettoyer les systèmes .</text:p>
        </text:list-item>
        <text:list-item>
          <text:p text:style-name="P5"><text:span text:style-name="Strong_20_Emphasis">Actions :</text:span></text:p>
          <text:list>
            <text:list-item>
              <text:p text:style-name="P5"><text:soft-page-break/><text:span text:style-name="Strong_20_Emphasis">Suppression :</text:span> Éliminer les logiciels malveillants, les backdoors, les comptes utilisateurs créés par l'attaquant.</text:p>
            </text:list-item>
            <text:list-item>
              <text:p text:style-name="P5"><text:span text:style-name="Strong_20_Emphasis">Correction :</text:span> Appliquer les correctifs de sécurité (patches) nécessaires.</text:p>
            </text:list-item>
            <text:list-item>
              <text:p text:style-name="P5"><text:span text:style-name="Strong_20_Emphasis">Réinstallation :</text:span> Si la compromission est profonde, <text:span text:style-name="Strong_20_Emphasis">réinstaller la VM à partir d'une image propre</text:span> (stratégie privilégiée).</text:p>
            </text:list-item>
          </text:list>
        </text:list-item>
      </text:list>
      <text:h text:style-name="Heading_20_4" text:outline-level="4">Phase 5 : ♻️ RÉTABLISSEMENT (Récupération)</text:h>
      <text:list xml:id="list44709174" text:style-name="L6">
        <text:list-item>
          <text:p text:style-name="P6"><text:span text:style-name="Strong_20_Emphasis">Objectif :</text:span> Remettre les services en production de façon sécurisée .</text:p>
        </text:list-item>
        <text:list-item>
          <text:p text:style-name="P6"><text:span text:style-name="Strong_20_Emphasis">Actions :</text:span></text:p>
          <text:list>
            <text:list-item>
              <text:p text:style-name="P6"><text:span text:style-name="Strong_20_Emphasis">Restauration :</text:span> Restaurer les données depuis les sauvegardes (ex: PostgreSQL dump, rsync Nextcloud).</text:p>
            </text:list-item>
            <text:list-item>
              <text:p text:style-name="P6"><text:span text:style-name="Strong_20_Emphasis">Vérification :</text:span> Tester l'intégrité des données et le bon fonctionnement des services.</text:p>
            </text:list-item>
            <text:list-item>
              <text:p text:style-name="P6"><text:span text:style-name="Strong_20_Emphasis">Surveillance renforcée :</text:span> Mettre les systèmes restaurés sous surveillance accrue (Wazuh) pendant une période définie pour s'assurer de l'absence de résurgence.</text:p>
            </text:list-item>
            <text:list-item>
              <text:p text:style-name="P6"><text:span text:style-name="Strong_20_Emphasis">Rétablissement progressif :</text:span> Remettre en production la VM, puis les services associés.</text:p>
            </text:list-item>
          </text:list>
        </text:list-item>
      </text:list>
      <text:h text:style-name="Heading_20_4" text:outline-level="4">Phase 6 : 📝 ENSEIGNEMENTS TIRÉS (Post-Incident)</text:h>
      <text:list xml:id="list1488189057" text:style-name="L7">
        <text:list-item>
          <text:p text:style-name="P7"><text:span text:style-name="Strong_20_Emphasis">Objectif :</text:span> S'améliorer continuellement .</text:p>
        </text:list-item>
        <text:list-item>
          <text:p text:style-name="P7"><text:span text:style-name="Strong_20_Emphasis">Actions :</text:span></text:p>
          <text:list>
            <text:list-item>
              <text:p text:style-name="P7"><text:span text:style-name="Strong_20_Emphasis">Réunion post-mortem :</text:span> Organiser une réunion avec tout le CSIRT (sans blâme) .</text:p>
            </text:list-item>
            <text:list-item>
              <text:p text:style-name="P7"><text:span text:style-name="Strong_20_Emphasis">Rapport d'Incident :</text:span> Rédiger un rapport détaillé comprenant la <text:span text:style-name="Strong_20_Emphasis">chronologie</text:span>, les <text:span text:style-name="Strong_20_Emphasis">actions entreprises</text:span>, l'<text:span text:style-name="Strong_20_Emphasis">impact</text:span> (perte de données, temps d'arrêt), et les <text:span text:style-name="Strong_20_Emphasis">recommandations</text:span>.</text:p>
            </text:list-item>
            <text:list-item>
              <text:p text:style-name="P7"><text:span text:style-name="Strong_20_Emphasis">Mise à jour :</text:span> Intégrer les leçons apprises pour améliorer ce plan, les politiques de sécurité, et les contrôles techniques.</text:p>
            </text:list-item>
          </text:list>
        </text:list-item>
      </text:list>
      <text:p text:style-name="Horizontal_20_Line"/>
      <text:h text:style-name="Heading_20_3" text:outline-level="3">5. PLAN DE COMMUNICATION</text:h>
      <text:p text:style-name="Text_20_body">Une communication claire est essentielle .</text:p>
      <text:list xml:id="list4212305091" text:style-name="L8">
        <text:list-item>
          <text:p text:style-name="P8"><text:span text:style-name="Strong_20_Emphasis">Interne :</text:span></text:p>
          <text:list>
            <text:list-item>
              <text:p text:style-name="P8">Canal sécurisé (ex: Signal/Telegram) pour le CSIRT.</text:p>
            </text:list-item>
            <text:list-item>
              <text:p text:style-name="P8">Le "Directeur de la Réponse" tient la direction informée régulièrement.</text:p>
            </text:list-item>
            <text:list-item>
              <text:p text:style-name="P8">L'équipe est briefée sur ce qu'elle peut et ne peut pas dire à l'extérieur.</text:p>
            </text:list-item>
          </text:list>
        </text:list-item>
        <text:list-item>
          <text:p text:style-name="P8"><text:span text:style-name="Strong_20_Emphasis">Externe :</text:span></text:p>
          <text:list>
            <text:list-item>
              <text:p text:style-name="P8"><text:soft-page-break/><text:span text:style-name="Strong_20_Emphasis">ONG Client (la plus critique) :</text:span> Information immédiate si une attaque a compromis des données les concernant ou si un de leurs services est affecté. Être transparent sur la situation et les actions en cours.</text:p>
            </text:list-item>
            <text:list-item>
              <text:p text:style-name="P8"><text:span text:style-name="Strong_20_Emphasis">Donateurs / Partenaires :</text:span> Communication gérée par le Responsable Communication, en lien avec le Directeur. Éviter la spéculation.</text:p>
            </text:list-item>
            <text:list-item>
              <text:p text:style-name="P8"><text:span text:style-name="Strong_20_Emphasis">CNIL :</text:span> Notification dans les <text:span text:style-name="Strong_20_Emphasis">72 heures</text:span> si une violation de données personnelles est avérée (obligation RGPD) .</text:p>
            </text:list-item>
            <text:list-item>
              <text:p text:style-name="P8"><text:span text:style-name="Strong_20_Emphasis">Autorités (Police) :</text:span> Décision conjointe avec le Responsable Juridique, si l'incident a un caractère criminel.</text:p>
            </text:list-item>
          </text:list>
        </text:list-item>
      </text:list>
      <text:p text:style-name="Horizontal_20_Line"/>
      <text:h text:style-name="Heading_20_3" text:outline-level="3">6. EXEMPLE DE SCÉNARIO : ATTAQUE PAR RANSOMWARE</text:h>
      <text:list xml:id="list1837121736" text:style-name="L9">
        <text:list-item>
          <text:p text:style-name="P9"><text:span text:style-name="Strong_20_Emphasis">IDENTIFICATION :</text:span> Une alerte Wazuh critique signale un chiffrement massif de fichiers sur <text:span text:style-name="Source_20_Text">lyon-nextcloud</text:span>.</text:p>
        </text:list-item>
        <text:list-item>
          <text:p text:style-name="P9"><text:span text:style-name="Strong_20_Emphasis">CONFINEMENT (URGENT) :</text:span></text:p>
          <text:list>
            <text:list-item>
              <text:p text:style-name="P9">L'équipe technique isole immédiatement <text:span text:style-name="Source_20_Text">lyon-nextcloud</text:span> du réseau pour éviter la propagation à <text:span text:style-name="Source_20_Text">lyon-dc</text:span> ou <text:span text:style-name="Source_20_Text">lyon-db</text:span>.</text:p>
            </text:list-item>
            <text:list-item>
              <text:p text:style-name="P9">Le VPN WireGuard est temporairement désactivé pour prévenir la propagation à Marseille.</text:p>
            </text:list-item>
          </text:list>
        </text:list-item>
        <text:list-item>
          <text:p text:style-name="P9"><text:span text:style-name="Strong_20_Emphasis">ÉRADICATION :</text:span></text:p>
          <text:list>
            <text:list-item>
              <text:p text:style-name="P9">L'analyse forensique montre que le ransomware est entré via un compte compromis. La VM est arrêtée.</text:p>
            </text:list-item>
          </text:list>
        </text:list-item>
        <text:list-item>
          <text:p text:style-name="P9"><text:span text:style-name="Strong_20_Emphasis">RÉTABLISSEMENT :</text:span></text:p>
          <text:list>
            <text:list-item>
              <text:p text:style-name="P9">Une nouvelle VM <text:span text:style-name="Source_20_Text">lyon-nextcloud</text:span> est déployée à partir d'une image propre.</text:p>
            </text:list-item>
            <text:list-item>
              <text:p text:style-name="P9">Les données sont restaurées à partir du dernier backup <text:span text:style-name="Source_20_Text">rsync</text:span> en date (sauvegarde externe).</text:p>
            </text:list-item>
          </text:list>
        </text:list-item>
        <text:list-item>
          <text:p text:style-name="P9"><text:span text:style-name="Strong_20_Emphasis">ENSEIGNEMENTS :</text:span></text:p>
          <text:list>
            <text:list-item>
              <text:p text:style-name="P9">Le rapport d'incident révèle que le mot de passe du compte compromis était faible.</text:p>
            </text:list-item>
            <text:list-item>
              <text:p text:style-name="P9"><text:span text:style-name="Strong_20_Emphasis">Action corrective :</text:span> Renforcement de la politique de mots de passe, activation de la MFA sur tous les comptes, et formation des utilisateurs au phishing .</text:p>
            </text:list-item>
          </text:list>
        </text:list-item>
      </text:list>
      <text:p text:style-name="Horizontal_20_Line"/>
      <text:h text:style-name="Heading_20_3" text:outline-level="3">7. RÉVISION ET MAINTENANCE DU PLAN</text:h>
      <text:list xml:id="list3647453007" text:style-name="L10">
        <text:list-item>
          <text:p text:style-name="P10"><text:span text:style-name="Strong_20_Emphasis">Révision Annuelle :</text:span> Le plan est revu et mis à jour tous les ans.</text:p>
        </text:list-item>
        <text:list-item>
          <text:p text:style-name="P10"><text:span text:style-name="Strong_20_Emphasis">Déclencheurs de Mise à Jour :</text:span> Après un incident majeur, après un changement d'infrastructure significatif, ou lors de l'arrivée de nouvelles menaces.</text:p>
        </text:list-item>
        <text:list-item>
          <text:p text:style-name="P10"><text:soft-page-break/><text:span text:style-name="Strong_20_Emphasis">Exercices :</text:span> Des simulations ("tabletop exercises") sont organisées tous les 6 mois pour tester la préparation de l'équip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17T10:50:40.665000000</meta:creation-date>
    <dc:date>2026-06-17T10:51:19.414000000</dc:date>
    <meta:editing-duration>PT38S</meta:editing-duration>
    <meta:editing-cycles>1</meta:editing-cycles>
    <meta:document-statistic meta:table-count="3" meta:image-count="0" meta:object-count="0" meta:page-count="6" meta:paragraph-count="132" meta:word-count="1409" meta:character-count="9035" meta:non-whitespace-character-count="7800"/>
    <meta:generator>LibreOffice/5.4.0.3$Windows_X86_64 LibreOffice_project/7556cbc6811c9d992f4064ab9287069087d7f62c</meta:generator>
  </office:meta>
</office:document-meta>
</file>