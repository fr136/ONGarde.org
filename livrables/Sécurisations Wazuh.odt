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Preformatted_20_Text">
      <style:paragraph-properties fo:margin-top="0cm" fo:margin-bottom="0.499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Voici une proposition de configurations de sécurité pour chaque agent, en tenant compte des normes actuelles, notamment le <text:span text:style-name="Strong_20_Emphasis">NIST Cybersecurity Framework (CSF)</text:span> et les bonnes pratiques du <text:span text:style-name="Strong_20_Emphasis">CIS Controls</text:span>.</text:p>
      <text:p text:style-name="Horizontal_20_Line"/>
      <text:h text:style-name="Heading_20_3" text:outline-level="3">🧱 Principes Généraux de Sécurisation des Agents Wazuh</text:h>
      <text:p text:style-name="Text_20_body">Avant d'entrer dans le détail, voici les règles que nous appliquerons systématiquement :</text:p>
      <text:list xml:id="list1635149237" text:style-name="L1">
        <text:list-item>
          <text:p text:style-name="P1"><text:span text:style-name="Strong_20_Emphasis">Principe du Moindre Privilège</text:span> : L'agent ne doit collecter que les logs strictement nécessaires pour détecter les menaces sur son service.</text:p>
        </text:list-item>
        <text:list-item>
          <text:p text:style-name="P1"><text:span text:style-name="Strong_20_Emphasis">Chiffrement des Communications</text:span> : Toutes les communications entre l'agent et le manager se font en TLS (nous configurerons le paramètre <text:span text:style-name="Source_20_Text">&lt;protocol&gt;tls&lt;/protocol&gt;</text:span>).</text:p>
        </text:list-item>
        <text:list-item>
          <text:p text:style-name="P1"><text:span text:style-name="Strong_20_Emphasis">Authentification Forte</text:span> : Utilisation de clés d'authentification (<text:span text:style-name="Source_20_Text">&lt;key&gt;&lt;/key&gt;</text:span>) et non de mots de passe pour l'agent.</text:p>
        </text:list-item>
        <text:list-item>
          <text:p text:style-name="P1"><text:span text:style-name="Strong_20_Emphasis">Audit et Journalisation</text:span> : Surveillance de l'activité de l'agent lui-même (<text:span text:style-name="Source_20_Text">&lt;logall&gt;</text:span> peut être activé en cas d'incident, mais désactivé par défaut pour des raisons de performance).</text:p>
        </text:list-item>
        <text:list-item>
          <text:p text:style-name="P1"><text:span text:style-name="Strong_20_Emphasis">Mise à Jour Continue</text:span> : Les agents doivent être mis à jour régulièrement pour bénéficier des derniers correctifs de sécurité.</text:p>
        </text:list-item>
      </text:list>
      <text:p text:style-name="Horizontal_20_Line"/>
      <text:h text:style-name="Heading_20_3" text:outline-level="3">🖥️ 1. Agent sur le Serveur Web (<text:span text:style-name="Source_20_Text">lyon-web</text:span>) en DMZ</text:h>
      <text:p text:style-name="Text_20_body">C'est l'agent le plus exposé. Sa configuration doit être très stricte pour limiter la surface d'attaque et détecter toute compromission.</text:p>
      <text:h text:style-name="Heading_20_4" text:outline-level="4">Fichier de configuration (<text:span text:style-name="Source_20_Text">/var/ossec/etc/ossec.conf</text:span>) - Points clés :</text:h>
      <text:p text:style-name="Text_20_body">xml</text:p>
      <text:p text:style-name="Preformatted_20_Text">&lt;ossec_config&gt;</text:p>
      <text:p text:style-name="Preformatted_20_Text"><text:s text:c="2"/>&lt;client&gt;</text:p>
      <text:p text:style-name="Preformatted_20_Text"><text:s text:c="4"/>&lt;server&gt;</text:p>
      <text:p text:style-name="Preformatted_20_Text"><text:s text:c="6"/>&lt;address&gt;192.168.1.50&lt;/address&gt;</text:p>
      <text:p text:style-name="Preformatted_20_Text"><text:s text:c="6"/>&lt;port&gt;1514&lt;/port&gt;</text:p>
      <text:p text:style-name="Preformatted_20_Text"><text:s text:c="6"/>&lt;protocol&gt;tls&lt;/protocol&gt; &lt;!-- Communication chiffrée --&gt;</text:p>
      <text:p text:style-name="Preformatted_20_Text"><text:s text:c="4"/>&lt;/server&gt;</text:p>
      <text:p text:style-name="Preformatted_20_Text"><text:s text:c="4"/>&lt;config-profile&gt;web, dmz&lt;/config-profile&gt; &lt;!-- Profil pour des règles spécifiques --&gt;</text:p>
      <text:p text:style-name="Preformatted_20_Text"><text:s text:c="4"/>&lt;notify_time&gt;10&lt;/notify_time&gt;</text:p>
      <text:p text:style-name="Preformatted_20_Text"><text:s text:c="4"/>&lt;time-reconnect&gt;60&lt;/time-reconnect&gt;</text:p>
      <text:p text:style-name="Preformatted_20_Text"><text:s text:c="4"/>&lt;crypto_method&gt;aes&lt;/crypto_method&gt;</text:p>
      <text:p text:style-name="Preformatted_20_Text"><text:s text:c="2"/>&lt;/client&gt;</text:p>
      <text:p text:style-name="Preformatted_20_Text"/>
      <text:p text:style-name="Preformatted_20_Text"><text:s text:c="2"/>&lt;!-- Collecte des logs Web spécifiques --&gt;</text:p>
      <text:p text:style-name="Preformatted_20_Text"><text:s text:c="2"/>&lt;localfile&gt;</text:p>
      <text:p text:style-name="Preformatted_20_Text"><text:s text:c="4"/>&lt;log_format&gt;apache&lt;/log_format&gt; &lt;!-- Ou nginx --&gt;</text:p>
      <text:p text:style-name="Preformatted_20_Text"><text:s text:c="4"/>&lt;location&gt;/var/log/nginx/access.log&lt;/location&gt;</text:p>
      <text:p text:style-name="Preformatted_20_Text"><text:s text:c="2"/>&lt;/localfile&gt;</text:p>
      <text:p text:style-name="Preformatted_20_Text"/>
      <text:p text:style-name="Preformatted_20_Text"><text:s text:c="2"/>&lt;localfile&gt;</text:p>
      <text:p text:style-name="Preformatted_20_Text"><text:s text:c="4"/>&lt;log_format&gt;apache_error&lt;/log_format&gt;</text:p>
      <text:p text:style-name="Preformatted_20_Text"><text:soft-page-break/><text:s text:c="4"/>&lt;location&gt;/var/log/nginx/error.log&lt;/location&gt;</text:p>
      <text:p text:style-name="Preformatted_20_Text"><text:s text:c="2"/>&lt;/localfile&gt;</text:p>
      <text:p text:style-name="Preformatted_20_Text"/>
      <text:p text:style-name="Preformatted_20_Text"><text:s text:c="2"/>&lt;!-- Collecte des logs système critiques --&gt;</text:p>
      <text:p text:style-name="Preformatted_20_Text"><text:s text:c="2"/>&lt;localfile&gt;</text:p>
      <text:p text:style-name="Preformatted_20_Text"><text:s text:c="4"/>&lt;log_format&gt;syslog&lt;/log_format&gt;</text:p>
      <text:p text:style-name="Preformatted_20_Text"><text:s text:c="4"/>&lt;location&gt;/var/log/syslog&lt;/location&gt;</text:p>
      <text:p text:style-name="Preformatted_20_Text"><text:s text:c="2"/>&lt;/localfile&gt;</text:p>
      <text:p text:style-name="Preformatted_20_Text"/>
      <text:p text:style-name="Preformatted_20_Text"><text:s text:c="2"/>&lt;!-- Surveillance de l'intégrité des fichiers critiques --&gt;</text:p>
      <text:p text:style-name="Preformatted_20_Text"><text:s text:c="2"/>&lt;syscheck&gt;</text:p>
      <text:p text:style-name="Preformatted_20_Text"><text:s text:c="4"/>&lt;directories check_all="yes" realtime="yes"&gt;/etc/nginx,/var/www/html&lt;/directories&gt; &lt;!-- Surveillance en temps réel --&gt;</text:p>
      <text:p text:style-name="Preformatted_20_Text"><text:s text:c="4"/>&lt;directories check_all="yes"&gt;/bin,/sbin,/usr/bin,/usr/sbin&lt;/directories&gt;</text:p>
      <text:p text:style-name="Preformatted_20_Text"><text:s text:c="4"/>&lt;ignore&gt;/var/www/html/uploads&lt;/ignore&gt; &lt;!-- Ignorer les répertoires temporaires --&gt;</text:p>
      <text:p text:style-name="Preformatted_20_Text"><text:s text:c="2"/>&lt;/syscheck&gt;</text:p>
      <text:p text:style-name="Preformatted_20_Text"/>
      <text:p text:style-name="Preformatted_20_Text"><text:s text:c="2"/>&lt;!-- Détection des rootkits --&gt;</text:p>
      <text:p text:style-name="Preformatted_20_Text"><text:s text:c="2"/>&lt;rootcheck&gt;</text:p>
      <text:p text:style-name="Preformatted_20_Text"><text:s text:c="4"/>&lt;rootkit_files&gt;/var/ossec/etc/shared/rootkit_files.txt&lt;/rootkit_files&gt;</text:p>
      <text:p text:style-name="Preformatted_20_Text"><text:s text:c="4"/>&lt;rootkit_trojans&gt;/var/ossec/etc/shared/rootkit_trojans.txt&lt;/rootkit_trojans&gt;</text:p>
      <text:p text:style-name="Preformatted_20_Text"><text:s text:c="2"/>&lt;/rootcheck&gt;</text:p>
      <text:p text:style-name="Preformatted_20_Text"/>
      <text:p text:style-name="Preformatted_20_Text"><text:s text:c="2"/>&lt;!-- Règles de détection spécifiques pour DMZ --&gt;</text:p>
      <text:p text:style-name="Preformatted_20_Text"><text:s text:c="2"/>&lt;rules&gt;</text:p>
      <text:p text:style-name="Preformatted_20_Text"><text:s text:c="4"/>&lt;include&gt;ruleset.xml&lt;/include&gt;</text:p>
      <text:p text:style-name="Preformatted_20_Text"><text:s text:c="4"/>&lt;!-- Ajout de règles personnalisées pour détecter les attaques web --&gt;</text:p>
      <text:p text:style-name="Preformatted_20_Text"><text:s text:c="4"/>&lt;rule id="100001" level="10"&gt;</text:p>
      <text:p text:style-name="Preformatted_20_Text"><text:s text:c="6"/>&lt;if_sid&gt;31101&lt;/if_sid&gt; &lt;!-- Règle de base pour les attaques web --&gt;</text:p>
      <text:p text:style-name="Preformatted_20_Text"><text:s text:c="6"/>&lt;match&gt;sql injection|../|etc/passwd&lt;/match&gt;</text:p>
      <text:p text:style-name="Preformatted_20_Text"><text:s text:c="6"/>&lt;description&gt;Web Attack Detected on DMZ Server&lt;/description&gt;</text:p>
      <text:p text:style-name="Preformatted_20_Text"><text:s text:c="4"/>&lt;/rule&gt;</text:p>
      <text:p text:style-name="Preformatted_20_Text"><text:s text:c="2"/>&lt;/rules&gt;</text:p>
      <text:p text:style-name="P8">&lt;/ossec_config&gt;</text:p>
      <text:p text:style-name="Text_20_body"><text:span text:style-name="Strong_20_Emphasis">Résumé des sécurités :</text:span></text:p>
      <text:list xml:id="list2675814189" text:style-name="L2">
        <text:list-item>
          <text:p text:style-name="P2"><text:span text:style-name="Strong_20_Emphasis">TLS activé</text:span> : Chiffrement des communications.</text:p>
        </text:list-item>
        <text:list-item>
          <text:p text:style-name="P2"><text:span text:style-name="Strong_20_Emphasis">Surveillance temps réel</text:span> : Détection immédiate des modifications malveillantes sur les fichiers web.</text:p>
        </text:list-item>
        <text:list-item>
          <text:p text:style-name="P2"><text:span text:style-name="Strong_20_Emphasis">Logs spécifiques</text:span> : Analyse des logs d'accès et d'erreur du serveur web.</text:p>
        </text:list-item>
        <text:list-item>
          <text:p text:style-name="P2"><text:span text:style-name="Strong_20_Emphasis">Règle personnalisée</text:span> : Alerte renforcée pour les attaques web classiques (SQLi, LFI).</text:p>
        </text:list-item>
      </text:list>
      <text:p text:style-name="Horizontal_20_Line"/>
      <text:h text:style-name="Heading_20_3" text:outline-level="3">🗄️ 2. Agent sur la Base de Données (<text:span text:style-name="Source_20_Text">lyon-db</text:span>)</text:h>
      <text:p text:style-name="Text_20_body">La base de données stocke les données les plus sensibles. Sa configuration doit se concentrer sur la détection des accès anormaux et des requêtes malveillantes.</text:p>
      <text:h text:style-name="Heading_20_4" text:outline-level="4">Fichier de configuration (<text:span text:style-name="Source_20_Text">/var/ossec/etc/ossec.conf</text:span>) - Points clés :</text:h>
      <text:p text:style-name="Text_20_body">xml</text:p>
      <text:p text:style-name="Preformatted_20_Text">&lt;ossec_config&gt;</text:p>
      <text:p text:style-name="Preformatted_20_Text"><text:s text:c="2"/>&lt;client&gt;</text:p>
      <text:p text:style-name="Preformatted_20_Text"><text:soft-page-break/><text:s text:c="4"/>&lt;server&gt;</text:p>
      <text:p text:style-name="Preformatted_20_Text"><text:s text:c="6"/>&lt;address&gt;192.168.1.50&lt;/address&gt;</text:p>
      <text:p text:style-name="Preformatted_20_Text"><text:s text:c="6"/>&lt;port&gt;1514&lt;/port&gt;</text:p>
      <text:p text:style-name="Preformatted_20_Text"><text:s text:c="6"/>&lt;protocol&gt;tls&lt;/protocol&gt;</text:p>
      <text:p text:style-name="Preformatted_20_Text"><text:s text:c="4"/>&lt;/server&gt;</text:p>
      <text:p text:style-name="Preformatted_20_Text"><text:s text:c="4"/>&lt;config-profile&gt;database&lt;/config-profile&gt;</text:p>
      <text:p text:style-name="Preformatted_20_Text"><text:s text:c="2"/>&lt;/client&gt;</text:p>
      <text:p text:style-name="Preformatted_20_Text"/>
      <text:p text:style-name="Preformatted_20_Text"><text:s text:c="2"/>&lt;!-- Collecte des logs PostgreSQL --&gt;</text:p>
      <text:p text:style-name="Preformatted_20_Text"><text:s text:c="2"/>&lt;localfile&gt;</text:p>
      <text:p text:style-name="Preformatted_20_Text"><text:s text:c="4"/>&lt;log_format&gt;postgresql&lt;/log_format&gt;</text:p>
      <text:p text:style-name="Preformatted_20_Text"><text:s text:c="4"/>&lt;location&gt;/var/log/postgresql/postgresql-*.log&lt;/location&gt;</text:p>
      <text:p text:style-name="Preformatted_20_Text"><text:s text:c="2"/>&lt;/localfile&gt;</text:p>
      <text:p text:style-name="Preformatted_20_Text"/>
      <text:p text:style-name="Preformatted_20_Text"><text:s text:c="2"/>&lt;!-- Logs d'authentification --&gt;</text:p>
      <text:p text:style-name="Preformatted_20_Text"><text:s text:c="2"/>&lt;localfile&gt;</text:p>
      <text:p text:style-name="Preformatted_20_Text"><text:s text:c="4"/>&lt;log_format&gt;syslog&lt;/log_format&gt;</text:p>
      <text:p text:style-name="Preformatted_20_Text"><text:s text:c="4"/>&lt;location&gt;/var/log/auth.log&lt;/location&gt;</text:p>
      <text:p text:style-name="Preformatted_20_Text"><text:s text:c="2"/>&lt;/localfile&gt;</text:p>
      <text:p text:style-name="Preformatted_20_Text"/>
      <text:p text:style-name="Preformatted_20_Text"><text:s text:c="2"/>&lt;!-- Surveillance renforcée des fichiers de configuration --&gt;</text:p>
      <text:p text:style-name="Preformatted_20_Text"><text:s text:c="2"/>&lt;syscheck&gt;</text:p>
      <text:p text:style-name="Preformatted_20_Text"><text:s text:c="4"/>&lt;directories check_all="yes" report_changes="yes" realtime="yes"&gt;/etc/postgresql&lt;/directories&gt;</text:p>
      <text:p text:style-name="Preformatted_20_Text"><text:s text:c="4"/>&lt;directories check_all="yes" report_changes="yes"&gt;/etc/ssl/private&lt;/directories&gt;</text:p>
      <text:p text:style-name="Preformatted_20_Text"><text:s text:c="4"/>&lt;ignore&gt;/var/lib/postgresql/data&lt;/ignore&gt; &lt;!-- Données volumineuses, surveillées autrement --&gt;</text:p>
      <text:p text:style-name="Preformatted_20_Text"><text:s text:c="2"/>&lt;/syscheck&gt;</text:p>
      <text:p text:style-name="Preformatted_20_Text"/>
      <text:p text:style-name="Preformatted_20_Text"><text:s text:c="2"/>&lt;!-- Règles de détection pour la base de données --&gt;</text:p>
      <text:p text:style-name="Preformatted_20_Text"><text:s text:c="2"/>&lt;rules&gt;</text:p>
      <text:p text:style-name="Preformatted_20_Text"><text:s text:c="4"/>&lt;include&gt;ruleset.xml&lt;/include&gt;</text:p>
      <text:p text:style-name="Preformatted_20_Text"><text:s text:c="4"/>&lt;!-- Détection des échecs de connexion multiples --&gt;</text:p>
      <text:p text:style-name="Preformatted_20_Text"><text:s text:c="4"/>&lt;rule id="100002" level="10"&gt;</text:p>
      <text:p text:style-name="Preformatted_20_Text"><text:s text:c="6"/>&lt;if_sid&gt;5501&lt;/if_sid&gt; &lt;!-- Règle pour les erreurs PostgreSQL --&gt;</text:p>
      <text:p text:style-name="Preformatted_20_Text"><text:s text:c="6"/>&lt;match&gt;FATAL|ERROR&lt;/match&gt;</text:p>
      <text:p text:style-name="Preformatted_20_Text"><text:s text:c="6"/>&lt;description&gt;PostgreSQL Error Detected - Potential Attack&lt;/description&gt;</text:p>
      <text:p text:style-name="Preformatted_20_Text"><text:s text:c="4"/>&lt;/rule&gt;</text:p>
      <text:p text:style-name="Preformatted_20_Text"><text:s text:c="2"/>&lt;/rules&gt;</text:p>
      <text:p text:style-name="P8">&lt;/ossec_config&gt;</text:p>
      <text:p text:style-name="Text_20_body"><text:span text:style-name="Strong_20_Emphasis">Résumé des sécurités :</text:span></text:p>
      <text:list xml:id="list4198552918" text:style-name="L3">
        <text:list-item>
          <text:p text:style-name="P3"><text:span text:style-name="Strong_20_Emphasis">TLS activé</text:span> : Communications chiffrées pour les logs de la DB.</text:p>
        </text:list-item>
        <text:list-item>
          <text:p text:style-name="P3"><text:span text:style-name="Strong_20_Emphasis">Surveillance stricte</text:span> : Détection de toute modification sur les fichiers de configuration et clés SSL.</text:p>
        </text:list-item>
        <text:list-item>
          <text:p text:style-name="P3"><text:span text:style-name="Strong_20_Emphasis">Logs d'erreurs DB</text:span> : Alerte sur les erreurs PostgreSQL (peuvent indiquer une tentative d'injection).</text:p>
        </text:list-item>
        <text:list-item>
          <text:p text:style-name="P3"><text:span text:style-name="Strong_20_Emphasis">Surveillance des authentifications</text:span> : Logs <text:span text:style-name="Source_20_Text">auth.log</text:span> pour détecter les tentatives de brute force.</text:p>
        </text:list-item>
      </text:list>
      <text:p text:style-name="Horizontal_20_Line"/>
      <text:h text:style-name="Heading_20_3" text:outline-level="3"><text:soft-page-break/>☁️ 3. Agent sur la Plateforme de Collaboration (<text:span text:style-name="Source_20_Text">lyon-nextcloud</text:span>)</text:h>
      <text:p text:style-name="Text_20_body">Nextcloud est un point d'entrée pour les utilisateurs. La configuration doit surveiller les accès aux fichiers et les authentifications.</text:p>
      <text:h text:style-name="Heading_20_4" text:outline-level="4">Fichier de configuration (<text:span text:style-name="Source_20_Text">/var/ossec/etc/ossec.conf</text:span>) - Points clés :</text:h>
      <text:p text:style-name="Text_20_body">xml</text:p>
      <text:p text:style-name="Preformatted_20_Text">&lt;ossec_config&gt;</text:p>
      <text:p text:style-name="Preformatted_20_Text"><text:s text:c="2"/>&lt;client&gt;</text:p>
      <text:p text:style-name="Preformatted_20_Text"><text:s text:c="4"/>&lt;server&gt;</text:p>
      <text:p text:style-name="Preformatted_20_Text"><text:s text:c="6"/>&lt;address&gt;192.168.1.50&lt;/address&gt;</text:p>
      <text:p text:style-name="Preformatted_20_Text"><text:s text:c="6"/>&lt;port&gt;1514&lt;/port&gt;</text:p>
      <text:p text:style-name="Preformatted_20_Text"><text:s text:c="6"/>&lt;protocol&gt;tls&lt;/protocol&gt;</text:p>
      <text:p text:style-name="Preformatted_20_Text"><text:s text:c="4"/>&lt;/server&gt;</text:p>
      <text:p text:style-name="Preformatted_20_Text"><text:s text:c="4"/>&lt;config-profile&gt;fileserver&lt;/config-profile&gt;</text:p>
      <text:p text:style-name="Preformatted_20_Text"><text:s text:c="2"/>&lt;/client&gt;</text:p>
      <text:p text:style-name="Preformatted_20_Text"/>
      <text:p text:style-name="Preformatted_20_Text"><text:s text:c="2"/>&lt;!-- Logs Nextcloud (via syslog ou fichier dédié) --&gt;</text:p>
      <text:p text:style-name="Preformatted_20_Text"><text:s text:c="2"/>&lt;localfile&gt;</text:p>
      <text:p text:style-name="Preformatted_20_Text"><text:s text:c="4"/>&lt;log_format&gt;syslog&lt;/log_format&gt;</text:p>
      <text:p text:style-name="Preformatted_20_Text"><text:s text:c="4"/>&lt;location&gt;/var/log/nextcloud/nextcloud.log&lt;/location&gt;</text:p>
      <text:p text:style-name="Preformatted_20_Text"><text:s text:c="2"/>&lt;/localfile&gt;</text:p>
      <text:p text:style-name="Preformatted_20_Text"/>
      <text:p text:style-name="Preformatted_20_Text"><text:s text:c="2"/>&lt;!-- Logs d'accès aux fichiers --&gt;</text:p>
      <text:p text:style-name="Preformatted_20_Text"><text:s text:c="2"/>&lt;localfile&gt;</text:p>
      <text:p text:style-name="Preformatted_20_Text"><text:s text:c="4"/>&lt;log_format&gt;syslog&lt;/log_format&gt;</text:p>
      <text:p text:style-name="Preformatted_20_Text"><text:s text:c="4"/>&lt;location&gt;/var/log/nextcloud/access.log&lt;/location&gt;</text:p>
      <text:p text:style-name="Preformatted_20_Text"><text:s text:c="2"/>&lt;/localfile&gt;</text:p>
      <text:p text:style-name="Preformatted_20_Text"/>
      <text:p text:style-name="Preformatted_20_Text"><text:s text:c="2"/>&lt;!-- Surveillance des répertoires partagés --&gt;</text:p>
      <text:p text:style-name="Preformatted_20_Text"><text:s text:c="2"/>&lt;syscheck&gt;</text:p>
      <text:p text:style-name="Preformatted_20_Text"><text:s text:c="4"/>&lt;directories check_all="yes" realtime="yes"&gt;/var/www/nextcloud/data&lt;/directories&gt;</text:p>
      <text:p text:style-name="Preformatted_20_Text"><text:s text:c="2"/>&lt;/syscheck&gt;</text:p>
      <text:p text:style-name="P8">&lt;/ossec_config&gt;</text:p>
      <text:p text:style-name="Text_20_body"><text:span text:style-name="Strong_20_Emphasis">Résumé des sécurités :</text:span></text:p>
      <text:list xml:id="list1740872217" text:style-name="L4">
        <text:list-item>
          <text:p text:style-name="P4"><text:span text:style-name="Strong_20_Emphasis">TLS activé</text:span>.</text:p>
        </text:list-item>
        <text:list-item>
          <text:p text:style-name="P4"><text:span text:style-name="Strong_20_Emphasis">Surveillance des logs Nextcloud</text:span> : Détection des erreurs applicatives et des accès suspects.</text:p>
        </text:list-item>
        <text:list-item>
          <text:p text:style-name="P4"><text:span text:style-name="Strong_20_Emphasis">Surveillance en temps réel</text:span> : Détection des modifications dans les données partagées.</text:p>
        </text:list-item>
      </text:list>
      <text:p text:style-name="Horizontal_20_Line"/>
      <text:h text:style-name="Heading_20_3" text:outline-level="3">🏢 4. Agent sur le Contrôleur de Domaine (<text:span text:style-name="Source_20_Text">lyon-dc</text:span>)</text:h>
      <text:p text:style-name="Text_20_body">Le contrôleur de domaine est le cœur de l'authentification. La configuration doit se concentrer sur la détection des comportements anormaux (mouvements latéraux, création de comptes suspects).</text:p>
      <text:h text:style-name="Heading_20_4" text:outline-level="4">Fichier de configuration (<text:span text:style-name="Source_20_Text">/var/ossec/etc/ossec.conf</text:span>) - Points clés :</text:h>
      <text:p text:style-name="Text_20_body">xml</text:p>
      <text:p text:style-name="Preformatted_20_Text">&lt;ossec_config&gt;</text:p>
      <text:p text:style-name="Preformatted_20_Text"><text:s text:c="2"/>&lt;client&gt;</text:p>
      <text:p text:style-name="Preformatted_20_Text"><text:s text:c="4"/>&lt;server&gt;</text:p>
      <text:p text:style-name="Preformatted_20_Text"><text:s text:c="6"/>&lt;address&gt;192.168.1.50&lt;/address&gt;</text:p>
      <text:p text:style-name="Preformatted_20_Text"><text:soft-page-break/><text:s text:c="6"/>&lt;port&gt;1514&lt;/port&gt;</text:p>
      <text:p text:style-name="Preformatted_20_Text"><text:s text:c="6"/>&lt;protocol&gt;tls&lt;/protocol&gt;</text:p>
      <text:p text:style-name="Preformatted_20_Text"><text:s text:c="4"/>&lt;/server&gt;</text:p>
      <text:p text:style-name="Preformatted_20_Text"><text:s text:c="4"/>&lt;config-profile&gt;active-directory&lt;/config-profile&gt;</text:p>
      <text:p text:style-name="Preformatted_20_Text"><text:s text:c="2"/>&lt;/client&gt;</text:p>
      <text:p text:style-name="Preformatted_20_Text"/>
      <text:p text:style-name="Preformatted_20_Text"><text:s text:c="2"/>&lt;!-- Logs d'authentification --&gt;</text:p>
      <text:p text:style-name="Preformatted_20_Text"><text:s text:c="2"/>&lt;localfile&gt;</text:p>
      <text:p text:style-name="Preformatted_20_Text"><text:s text:c="4"/>&lt;log_format&gt;syslog&lt;/log_format&gt;</text:p>
      <text:p text:style-name="Preformatted_20_Text"><text:s text:c="4"/>&lt;location&gt;/var/log/auth.log&lt;/location&gt;</text:p>
      <text:p text:style-name="Preformatted_20_Text"><text:s text:c="2"/>&lt;/localfile&gt;</text:p>
      <text:p text:style-name="Preformatted_20_Text"/>
      <text:p text:style-name="Preformatted_20_Text"><text:s text:c="2"/>&lt;!-- Logs Samba AD --&gt;</text:p>
      <text:p text:style-name="Preformatted_20_Text"><text:s text:c="2"/>&lt;localfile&gt;</text:p>
      <text:p text:style-name="Preformatted_20_Text"><text:s text:c="4"/>&lt;log_format&gt;syslog&lt;/log_format&gt;</text:p>
      <text:p text:style-name="Preformatted_20_Text"><text:s text:c="4"/>&lt;location&gt;/var/log/samba/log.*&lt;/location&gt;</text:p>
      <text:p text:style-name="Preformatted_20_Text"><text:s text:c="2"/>&lt;/localfile&gt;</text:p>
      <text:p text:style-name="Preformatted_20_Text"/>
      <text:p text:style-name="Preformatted_20_Text"><text:s text:c="2"/>&lt;!-- Surveillance des fichiers système critiques --&gt;</text:p>
      <text:p text:style-name="Preformatted_20_Text"><text:s text:c="2"/>&lt;syscheck&gt;</text:p>
      <text:p text:style-name="Preformatted_20_Text"><text:s text:c="4"/>&lt;directories check_all="yes"&gt;/etc/samba,/var/lib/samba/private&lt;/directories&gt;</text:p>
      <text:p text:style-name="Preformatted_20_Text"><text:s text:c="2"/>&lt;/syscheck&gt;</text:p>
      <text:p text:style-name="Preformatted_20_Text"/>
      <text:p text:style-name="Preformatted_20_Text"><text:s text:c="2"/>&lt;!-- Règle de détection pour les mouvements latéraux --&gt;</text:p>
      <text:p text:style-name="Preformatted_20_Text"><text:s text:c="2"/>&lt;rules&gt;</text:p>
      <text:p text:style-name="Preformatted_20_Text"><text:s text:c="4"/>&lt;include&gt;ruleset.xml&lt;/include&gt;</text:p>
      <text:p text:style-name="Preformatted_20_Text"><text:s text:c="4"/>&lt;rule id="100003" level="12"&gt;</text:p>
      <text:p text:style-name="Preformatted_20_Text"><text:s text:c="6"/>&lt;if_sid&gt;18100&lt;/if_sid&gt; &lt;!-- Règle pour les échecs d'authentification --&gt;</text:p>
      <text:p text:style-name="Preformatted_20_Text"><text:s text:c="6"/>&lt;match&gt;sudo|su|admin&lt;/match&gt;</text:p>
      <text:p text:style-name="Preformatted_20_Text"><text:s text:c="6"/>&lt;description&gt;Potential Privilege Escalation Detected&lt;/description&gt;</text:p>
      <text:p text:style-name="Preformatted_20_Text"><text:s text:c="4"/>&lt;/rule&gt;</text:p>
      <text:p text:style-name="Preformatted_20_Text"><text:s text:c="2"/>&lt;/rules&gt;</text:p>
      <text:p text:style-name="P8">&lt;/ossec_config&gt;</text:p>
      <text:p text:style-name="Text_20_body"><text:span text:style-name="Strong_20_Emphasis">Résumé des sécurités :</text:span></text:p>
      <text:list xml:id="list166895408" text:style-name="L5">
        <text:list-item>
          <text:p text:style-name="P5"><text:span text:style-name="Strong_20_Emphasis">TLS activé</text:span>.</text:p>
        </text:list-item>
        <text:list-item>
          <text:p text:style-name="P5"><text:span text:style-name="Strong_20_Emphasis">Surveillance des logs Samba</text:span> : Détection des accès et modifications AD.</text:p>
        </text:list-item>
        <text:list-item>
          <text:p text:style-name="P5"><text:span text:style-name="Strong_20_Emphasis">Surveillance des privilèges</text:span> : Alerte sur les commandes <text:span text:style-name="Source_20_Text">sudo</text:span> ou <text:span text:style-name="Source_20_Text">su</text:span>.</text:p>
        </text:list-item>
        <text:list-item>
          <text:p text:style-name="P5"><text:span text:style-name="Strong_20_Emphasis">Surveillance des fichiers clés</text:span> : Détection des modifications sur la configuration Samba.</text:p>
        </text:list-item>
      </text:list>
      <text:p text:style-name="Horizontal_20_Line"/>
      <text:h text:style-name="Heading_20_3" text:outline-level="3">✅ Checklist de Sécurité Complémentaire</text:h>
      <text:p text:style-name="Text_20_body">Vous avez bien couvert l'essentiel, mais voici des points supplémentaires à vérifier pour être au top des normes actuelles (NIST CSF, CIS Controls) :</text:p>
      <text:list xml:id="list2224082490" text:style-name="L6">
        <text:list-item>
          <text:p text:style-name="P6"><text:span text:style-name="Strong_20_Emphasis">Mises à Jour (CIS 1)</text:span> : Planifiez des mises à jour régulières des agents et du manager.</text:p>
        </text:list-item>
        <text:list-item>
          <text:p text:style-name="P6"><text:span text:style-name="Strong_20_Emphasis">Logs d'Audit (NIST </text:span><text:a xlink:type="simple" xlink:href="https://DE.AE/" office:target-frame-name="_blank" xlink:show="new" text:style-name="Internet_20_link" text:visited-style-name="Visited_20_Internet_20_Link"><text:span text:style-name="Strong_20_Emphasis">DE.AE</text:span></text:a><text:span text:style-name="Strong_20_Emphasis">)</text:span> : Centralisez les logs de l'agent lui-même (activité, erreurs) vers un serveur distant.</text:p>
        </text:list-item>
        <text:list-item>
          <text:p text:style-name="P6"><text:span text:style-name="Strong_20_Emphasis">Analyse des Règles (NIST </text:span><text:a xlink:type="simple" xlink:href="https://DE.CM/" office:target-frame-name="_blank" xlink:show="new" text:style-name="Internet_20_link" text:visited-style-name="Visited_20_Internet_20_Link"><text:span text:style-name="Strong_20_Emphasis">DE.CM</text:span></text:a><text:span text:style-name="Strong_20_Emphasis">)</text:span> : Passez en revue les règles Wazuh pour vos cas d'usage (attaque web, brute force DB, escalade de privilèges). La règle personnalisée que j'ai proposée est un bon début.</text:p>
        </text:list-item>
        <text:list-item>
          <text:p text:style-name="P6"><text:soft-page-break/><text:span text:style-name="Strong_20_Emphasis">Intégrité des Configurations (CIS 6)</text:span> : Utilisez le module de SCA (Security Configuration Assessment) de Wazuh pour vérifier que vos VMs respectent les benchmarks CIS.</text:p>
        </text:list-item>
        <text:list-item>
          <text:p text:style-name="P6"><text:span text:style-name="Strong_20_Emphasis">Surveillance Réseau (NIST </text:span><text:a xlink:type="simple" xlink:href="https://DE.CM/" office:target-frame-name="_blank" xlink:show="new" text:style-name="Internet_20_link" text:visited-style-name="Visited_20_Internet_20_Link"><text:span text:style-name="Strong_20_Emphasis">DE.CM</text:span></text:a><text:span text:style-name="Strong_20_Emphasis">)</text:span> : Pour le serveur web, si possible, ajoutez une surveillance des connexions réseau entrantes (ex: via <text:span text:style-name="Source_20_Text">netstat</text:span> ou un agent de flux).</text:p>
        </text:list-item>
        <text:list-item>
          <text:p text:style-name="P6"><text:span text:style-name="Strong_20_Emphasis">Plan de Réponse (NIST RS)</text:span> : Documentez les actions à prendre en cas d'alerte sur chaque agent (ex: isoler le serveur web en DMZ, révoquer les certificats AD).</text:p>
        </text:list-item>
      </text:list>
      <text:p text:style-name="Horizontal_20_Line"/>
      <text:h text:style-name="Heading_20_3" text:outline-level="3">💡 Prochaine Étape</text:h>
      <text:list xml:id="list521928309" text:style-name="L7">
        <text:list-item>
          <text:p text:style-name="P7"><text:span text:style-name="Strong_20_Emphasis">Appliquer les configurations</text:span> sur les agents concernés.</text:p>
        </text:list-item>
        <text:list-item>
          <text:p text:style-name="P7"><text:span text:style-name="Strong_20_Emphasis">Tester</text:span> les règles en simulant une attaque (ex: tentative de bruteforce sur la DB).</text:p>
        </text:list-item>
        <text:list-item>
          <text:p text:style-name="P7"><text:span text:style-name="Strong_20_Emphasis">Vérifier la remontée des alertes</text:span> dans le tableau de bord Wazuh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3T19:03:55.572000000</meta:creation-date>
    <dc:date>2026-06-23T19:05:08.797000000</dc:date>
    <meta:editing-duration>PT1M13S</meta:editing-duration>
    <meta:editing-cycles>1</meta:editing-cycles>
    <meta:generator>LibreOffice/5.4.0.3$Windows_X86_64 LibreOffice_project/7556cbc6811c9d992f4064ab9287069087d7f62c</meta:generator>
    <meta:document-statistic meta:table-count="0" meta:image-count="0" meta:object-count="0" meta:page-count="6" meta:paragraph-count="196" meta:word-count="1098" meta:character-count="9439" meta:non-whitespace-character-count="8135"/>
  </office:meta>
</office:document-meta>
</file>